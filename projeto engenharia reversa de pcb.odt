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3" svg:font-family="'source sans 3'" style:font-family-generic="roman" style:font-pitch="variable"/>
    <style:font-face style:name="source sans 31" svg:font-family="'source sans 3'" style:font-family-generic="system" style:font-pitch="variable"/>
    <style:font-face style:name="source serif 4" svg:font-family="'source serif 4'" style:font-family-generic="system" style:font-pitch="variable"/>
  </office:font-face-decls>
  <office:automatic-styles>
    <style:style style:name="Tabela1" style:family="table">
      <style:table-properties style:width="16.78cm" fo:margin-top="0cm" fo:margin-bottom="0cm" table:align="center" style:writing-mode="lr-tb"/>
    </style:style>
    <style:style style:name="Tabela1.A" style:family="table-column">
      <style:table-column-properties style:column-width="4.195cm"/>
    </style:style>
    <style:style style:name="Tabela1.D" style:family="table-column">
      <style:table-column-properties style:column-width="4.196cm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-left="0.282cm" fo:padding-right="0.282cm" fo:padding-top="0.141cm" fo:padding-bottom="0.141cm" fo:border-left="0.25pt solid #000000" fo:border-right="0.1pt solid #000000" fo:border-top="0.1pt solid #000000" fo:border-bottom="0.1pt solid #000000" style:writing-mode="lr-tb"/>
    </style:style>
    <style:style style:name="Tabela1.B1" style:family="table-cell">
      <style:table-cell-properties fo:padding-left="0.282cm" fo:padding-right="0.282cm" fo:padding-top="0.141cm" fo:padding-bottom="0.141cm" fo:border-left="none" fo:border-right="0.1pt solid #000000" fo:border-top="0.1pt solid #000000" fo:border-bottom="0.1pt solid #000000" style:writing-mode="lr-tb"/>
    </style:style>
    <style:style style:name="Tabela1.D1" style:family="table-cell">
      <style:table-cell-properties fo:padding-left="0.282cm" fo:padding-right="0.282cm" fo:padding-top="0.141cm" fo:padding-bottom="0.141cm" fo:border-left="none" fo:border-right="0.25pt solid #000000" fo:border-top="0.1pt solid #000000" fo:border-bottom="0.1pt solid #000000" style:writing-mode="lr-tb"/>
    </style:style>
    <style:style style:name="P1" style:family="paragraph" style:parent-style-name="Standard">
      <style:paragraph-properties fo:margin-left="-0.053cm" fo:margin-top="0.556cm" fo:margin-bottom="0.185cm" style:contextual-spacing="false" fo:line-height="150%" fo:text-align="left" style:justify-single-word="false"/>
      <style:text-properties fo:color="#000000" loext:opacity="100%" style:font-name="Arial" fo:font-size="12pt" fo:font-weight="bold" officeooo:paragraph-rsid="0002e18d" style:font-name-asian="source serif 4" style:font-size-asian="12pt" style:font-weight-asian="bold" style:font-name-complex="source serif 4" style:font-size-complex="12pt"/>
    </style:style>
    <style:style style:name="P2" style:family="paragraph" style:parent-style-name="Standard">
      <style:paragraph-properties fo:margin-left="-0.053cm" fo:margin-top="0.556cm" fo:margin-bottom="0.185cm" style:contextual-spacing="false" fo:line-height="150%" fo:text-align="left" style:justify-single-word="false"/>
      <style:text-properties fo:color="#000000" loext:opacity="100%" style:font-name="Arial" fo:font-size="12pt" officeooo:paragraph-rsid="0002e18d" style:font-name-asian="source serif 4" style:font-size-asian="12pt" style:font-name-complex="source serif 4" style:font-size-complex="12pt"/>
    </style:style>
    <style:style style:name="P3" style:family="paragraph" style:parent-style-name="Standard" style:list-style-name="WWNum4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" style:family="paragraph" style:parent-style-name="Standard" style:list-style-name="WWNum5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" style:family="paragraph" style:parent-style-name="Standard" style:list-style-name="WWNum5">
      <style:paragraph-properties fo:margin-top="0.185cm" fo:margin-bottom="0.185cm" style:contextual-spacing="false" fo:line-height="150%"/>
      <style:text-properties officeooo:paragraph-rsid="0002e18d"/>
    </style:style>
    <style:style style:name="P6" style:family="paragraph" style:parent-style-name="Standard" style:list-style-name="WWNum6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7" style:family="paragraph" style:parent-style-name="Standard" style:list-style-name="WWNum7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8" style:family="paragraph" style:parent-style-name="Standard" style:list-style-name="WWNum7">
      <style:paragraph-properties fo:margin-top="0.185cm" fo:margin-bottom="0.185cm" style:contextual-spacing="false" fo:line-height="150%"/>
      <style:text-properties officeooo:paragraph-rsid="0002e18d"/>
    </style:style>
    <style:style style:name="P9" style:family="paragraph" style:parent-style-name="Standard" style:list-style-name="WWNum8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0" style:family="paragraph" style:parent-style-name="Standard" style:list-style-name="WWNum9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1" style:family="paragraph" style:parent-style-name="Standard" style:list-style-name="WWNum9">
      <style:paragraph-properties fo:margin-top="0.185cm" fo:margin-bottom="0.185cm" style:contextual-spacing="false" fo:line-height="150%"/>
      <style:text-properties officeooo:paragraph-rsid="0002e18d"/>
    </style:style>
    <style:style style:name="P12" style:family="paragraph" style:parent-style-name="Standard" style:list-style-name="WWNum10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3" style:family="paragraph" style:parent-style-name="Standard" style:list-style-name="WWNum11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4" style:family="paragraph" style:parent-style-name="Standard" style:list-style-name="WWNum11">
      <style:paragraph-properties fo:margin-top="0.185cm" fo:margin-bottom="0.185cm" style:contextual-spacing="false" fo:line-height="150%"/>
      <style:text-properties officeooo:paragraph-rsid="0002e18d"/>
    </style:style>
    <style:style style:name="P15" style:family="paragraph" style:parent-style-name="Standard" style:list-style-name="WWNum12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6" style:family="paragraph" style:parent-style-name="Standard" style:list-style-name="WWNum13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7" style:family="paragraph" style:parent-style-name="Standard" style:list-style-name="WWNum14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8" style:family="paragraph" style:parent-style-name="Standard" style:list-style-name="WWNum15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19" style:family="paragraph" style:parent-style-name="Standard" style:list-style-name="WWNum15">
      <style:paragraph-properties fo:margin-top="0.185cm" fo:margin-bottom="0.185cm" style:contextual-spacing="false" fo:line-height="150%"/>
      <style:text-properties officeooo:paragraph-rsid="0002e18d"/>
    </style:style>
    <style:style style:name="P20" style:family="paragraph" style:parent-style-name="Standard" style:list-style-name="WWNum16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21" style:family="paragraph" style:parent-style-name="Standard" style:list-style-name="WWNum17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22" style:family="paragraph" style:parent-style-name="Standard">
      <style:paragraph-properties fo:margin-left="-0.053cm" fo:margin-top="0.556cm" fo:margin-bottom="0.185cm" style:contextual-spacing="false" fo:line-height="150%" fo:text-align="left" style:justify-single-word="false"/>
      <style:text-properties style:font-name="Arial" fo:font-size="12pt" officeooo:paragraph-rsid="0002e18d" style:font-size-asian="12pt" style:font-size-complex="12pt"/>
    </style:style>
    <style:style style:name="P23" style:family="paragraph" style:parent-style-name="Standard">
      <style:paragraph-properties fo:margin-top="0cm" fo:margin-bottom="0.37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24" style:family="paragraph" style:parent-style-name="Standard" style:list-style-name="WWNum18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25" style:family="paragraph" style:parent-style-name="Standard" style:list-style-name="WWNum18">
      <style:paragraph-properties fo:margin-top="0.185cm" fo:margin-bottom="0.185cm" style:contextual-spacing="false" fo:line-height="150%"/>
      <style:text-properties officeooo:paragraph-rsid="0002e18d"/>
    </style:style>
    <style:style style:name="P26" style:family="paragraph" style:parent-style-name="Standard" style:list-style-name="WWNum19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27" style:family="paragraph" style:parent-style-name="Standard" style:list-style-name="WWNum20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28" style:family="paragraph" style:parent-style-name="Standard" style:list-style-name="WWNum20">
      <style:paragraph-properties fo:margin-top="0.185cm" fo:margin-bottom="0.185cm" style:contextual-spacing="false" fo:line-height="150%"/>
      <style:text-properties officeooo:paragraph-rsid="0002e18d"/>
    </style:style>
    <style:style style:name="P29" style:family="paragraph" style:parent-style-name="Standard">
      <style:paragraph-properties fo:margin-top="0cm" fo:margin-bottom="0cm" style:contextual-spacing="false" fo:line-height="150%" fo:text-align="left" style:justify-single-word="false" fo:orphans="2" fo:widows="2"/>
      <style:text-properties style:font-name="Arial" fo:font-size="12pt" officeooo:paragraph-rsid="0002e18d" style:letter-kerning="false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50%" fo:text-align="left" style:justify-single-word="false" fo:orphans="2" fo:widows="2"/>
      <style:text-properties officeooo:paragraph-rsid="0002e18d" style:letter-kerning="false"/>
    </style:style>
    <style:style style:name="P31" style:family="paragraph" style:parent-style-name="Standard">
      <style:paragraph-properties fo:line-height="150%"/>
      <style:text-properties style:font-name="Arial" fo:font-size="12pt" officeooo:paragraph-rsid="0002e18d" style:font-size-asian="12pt" style:font-size-complex="12pt"/>
    </style:style>
    <style:style style:name="P32" style:family="paragraph" style:parent-style-name="Standard" style:list-style-name="WWNum21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33" style:family="paragraph" style:parent-style-name="Standard" style:list-style-name="WWNum21">
      <style:paragraph-properties fo:margin-top="0.185cm" fo:margin-bottom="0.185cm" style:contextual-spacing="false" fo:line-height="150%"/>
      <style:text-properties officeooo:paragraph-rsid="0002e18d"/>
    </style:style>
    <style:style style:name="P34" style:family="paragraph" style:parent-style-name="Standard">
      <style:paragraph-properties fo:margin-top="0cm" fo:margin-bottom="0.37cm" style:contextual-spacing="false" fo:line-height="150%"/>
      <style:text-properties officeooo:paragraph-rsid="0002e18d"/>
    </style:style>
    <style:style style:name="P35" style:family="paragraph" style:parent-style-name="Standard" style:list-style-name="WWNum22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36" style:family="paragraph" style:parent-style-name="Standard" style:list-style-name="WWNum22">
      <style:paragraph-properties fo:margin-top="0.185cm" fo:margin-bottom="0.185cm" style:contextual-spacing="false" fo:line-height="150%"/>
      <style:text-properties officeooo:paragraph-rsid="0002e18d"/>
    </style:style>
    <style:style style:name="P37" style:family="paragraph" style:parent-style-name="Standard" style:list-style-name="WWNum23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38" style:family="paragraph" style:parent-style-name="Standard" style:list-style-name="WWNum24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39" style:family="paragraph" style:parent-style-name="Standard" style:list-style-name="WWNum25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0" style:family="paragraph" style:parent-style-name="Standard" style:list-style-name="WWNum26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1" style:family="paragraph" style:parent-style-name="Standard" style:list-style-name="WWNum27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2" style:family="paragraph" style:parent-style-name="Standard" style:list-style-name="WWNum28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3" style:family="paragraph" style:parent-style-name="Standard" style:list-style-name="WWNum29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4" style:family="paragraph" style:parent-style-name="Standard" style:list-style-name="WWNum30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5" style:family="paragraph" style:parent-style-name="Standard" style:list-style-name="WWNum31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6" style:family="paragraph" style:parent-style-name="Standard" style:list-style-name="WWNum32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7" style:family="paragraph" style:parent-style-name="Standard" style:list-style-name="WWNum33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48" style:family="paragraph" style:parent-style-name="Standard" style:list-style-name="WWNum34">
      <style:paragraph-properties fo:margin-top="0.185cm" fo:margin-bottom="0.185cm" style:contextual-spacing="false" fo:line-height="150%"/>
      <style:text-properties officeooo:paragraph-rsid="0002e18d"/>
    </style:style>
    <style:style style:name="P49" style:family="paragraph" style:parent-style-name="Standard" style:list-style-name="WWNum35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0" style:family="paragraph" style:parent-style-name="Standard" style:list-style-name="WWNum36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1" style:family="paragraph" style:parent-style-name="Standard" style:list-style-name="WWNum37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2" style:family="paragraph" style:parent-style-name="Standard" style:list-style-name="WWNum38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3" style:family="paragraph" style:parent-style-name="Standard" style:list-style-name="WWNum39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4" style:family="paragraph" style:parent-style-name="Standard" style:list-style-name="WWNum40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5" style:family="paragraph" style:parent-style-name="Standard" style:list-style-name="WWNum41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6" style:family="paragraph" style:parent-style-name="Standard" style:list-style-name="WWNum42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7" style:family="paragraph" style:parent-style-name="Standard">
      <style:paragraph-properties fo:line-height="150%"/>
      <style:text-properties officeooo:paragraph-rsid="0002e18d"/>
    </style:style>
    <style:style style:name="P58" style:family="paragraph" style:parent-style-name="Standard" style:list-style-name="WWNum43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59" style:family="paragraph" style:parent-style-name="Standard" style:list-style-name="WWNum43">
      <style:paragraph-properties fo:margin-top="0.185cm" fo:margin-bottom="0.185cm" style:contextual-spacing="false" fo:line-height="150%"/>
      <style:text-properties officeooo:paragraph-rsid="0002e18d"/>
    </style:style>
    <style:style style:name="P60" style:family="paragraph" style:parent-style-name="Standard" style:list-style-name="WWNum44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61" style:family="paragraph" style:parent-style-name="Standard" style:list-style-name="WWNum45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62" style:family="paragraph" style:parent-style-name="Standard" style:list-style-name="WWNum46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63" style:family="paragraph" style:parent-style-name="Standard" style:list-style-name="WWNum46">
      <style:paragraph-properties fo:margin-top="0.185cm" fo:margin-bottom="0.185cm" style:contextual-spacing="false" fo:line-height="150%"/>
      <style:text-properties officeooo:paragraph-rsid="0002e18d"/>
    </style:style>
    <style:style style:name="P64" style:family="paragraph" style:parent-style-name="Standard" style:list-style-name="WWNum47">
      <style:paragraph-properties fo:margin-top="0.185cm" fo:margin-bottom="0.185cm" style:contextual-spacing="false" fo:line-height="150%"/>
      <style:text-properties officeooo:paragraph-rsid="0002e18d"/>
    </style:style>
    <style:style style:name="P65" style:family="paragraph" style:parent-style-name="Standard" style:list-style-name="WWNum47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66" style:family="paragraph" style:parent-style-name="Standard" style:list-style-name="WWNum48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67" style:family="paragraph" style:parent-style-name="Standard" style:list-style-name="WWNum49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68" style:family="paragraph" style:parent-style-name="Standard" style:list-style-name="WWNum50">
      <style:paragraph-properties fo:margin-top="0.185cm" fo:margin-bottom="0.185cm" style:contextual-spacing="false" fo:line-height="150%"/>
      <style:text-properties officeooo:paragraph-rsid="0002e18d"/>
    </style:style>
    <style:style style:name="P69" style:family="paragraph" style:parent-style-name="Standard" style:list-style-name="WWNum50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70" style:family="paragraph" style:parent-style-name="Standard" style:list-style-name="WWNum51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71" style:family="paragraph" style:parent-style-name="Standard" style:list-style-name="WWNum51">
      <style:paragraph-properties fo:margin-top="0.185cm" fo:margin-bottom="0.185cm" style:contextual-spacing="false" fo:line-height="150%"/>
      <style:text-properties officeooo:paragraph-rsid="0002e18d"/>
    </style:style>
    <style:style style:name="P72" style:family="paragraph" style:parent-style-name="Standard" style:list-style-name="WWNum52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P73" style:family="paragraph" style:parent-style-name="Standard" style:list-style-name="WWNum53">
      <style:paragraph-properties fo:margin-top="0.185cm" fo:margin-bottom="0.185cm" style:contextual-spacing="false" fo:line-height="150%"/>
      <style:text-properties style:font-name="Arial" fo:font-size="12pt" officeooo:paragraph-rsid="0002e18d" style:font-size-asian="12pt" style:font-size-complex="12pt"/>
    </style:style>
    <style:style style:name="T1" style:family="text">
      <style:text-properties officeooo:rsid="0002e18d"/>
    </style:style>
    <style:style style:name="T2" style:family="text">
      <style:text-properties fo:color="#000000" loext:opacity="100%" fo:font-weight="bold" style:font-name-asian="source serif 4" style:font-weight-asian="bold" style:font-name-complex="source serif 4"/>
    </style:style>
    <style:style style:name="T3" style:family="text">
      <style:text-properties fo:color="#000000" loext:opacity="100%" style:font-name-asian="source serif 4" style:font-name-complex="source serif 4"/>
    </style:style>
    <style:style style:name="T4" style:family="text">
      <style:text-properties fo:color="#000000" loext:opacity="100%" style:font-name="Arial" fo:font-size="12pt" style:font-name-asian="source serif 4" style:font-size-asian="12pt" style:font-name-complex="source serif 4" style:font-size-complex="12pt"/>
    </style:style>
    <style:style style:name="T5" style:family="text">
      <style:text-properties style:use-window-font-color="true" loext:opacity="0%" style:text-position="super 58%" style:font-name="source sans 3" fo:font-size="10.5pt" style:text-underline-style="solid" style:text-underline-width="auto" style:text-underline-color="font-color" style:font-name-asian="source sans 31" style:font-size-asian="10.5pt" style:font-name-complex="source sans 31" style:font-size-complex="12pt"/>
    </style:style>
    <style:style style:name="T6" style:family="text">
      <style:text-properties style:use-window-font-color="true" loext:opacity="0%" style:text-position="super 58%" style:font-name="Arial" fo:font-size="12pt" style:text-underline-style="solid" style:text-underline-width="auto" style:text-underline-color="font-color" style:font-name-asian="source sans 31" style:font-size-asian="12pt" style:font-name-complex="source sans 31" style:font-size-complex="12pt"/>
    </style:style>
    <style:style style:name="T7" style:family="text">
      <style:text-properties fo:color="#000000" loext:opacity="100%" style:font-name-asian="source sans 31" style:font-name-complex="source sans 31"/>
    </style:style>
    <style:style style:name="T8" style:family="text">
      <style:text-properties fo:color="#000000" loext:opacity="100%" style:font-name="Arial" fo:font-size="12pt" style:font-name-asian="source sans 31" style:font-size-asian="12pt" style:font-name-complex="source sans 31" style:font-size-complex="12pt"/>
    </style:style>
    <style:style style:name="T9" style:family="text">
      <style:text-properties style:use-window-font-color="true" loext:opacity="0%" style:text-position="super 58%" style:font-name="source sans 3" fo:font-size="8.5pt" style:text-underline-style="solid" style:text-underline-width="auto" style:text-underline-color="font-color" style:font-name-asian="source sans 31" style:font-size-asian="8.5pt" style:font-name-complex="source sans 31" style:font-size-complex="12pt"/>
    </style:style>
    <style:style style:name="T10" style:family="text">
      <style:text-properties fo:color="#000000" loext:opacity="100%" style:font-name="Arial" fo:font-size="12pt" fo:font-weight="bold" style:font-name-asian="source serif 4" style:font-size-asian="12pt" style:font-weight-asian="bold" style:font-name-complex="source serif 4" style:font-size-complex="12pt"/>
    </style:style>
    <style:style style:name="T11" style:family="text">
      <style:text-properties style:use-window-font-color="true" loext:opacity="0%" style:text-position="super 58%" style:font-name="source sans 3" fo:font-size="12pt" style:text-underline-style="solid" style:text-underline-width="auto" style:text-underline-color="font-color" style:font-name-asian="source sans 31" style:font-size-asian="12pt" style:font-name-complex="source sans 31" style:font-size-complex="12pt"/>
    </style:style>
    <style:style style:name="T12" style:family="text">
      <style:text-properties fo:color="#000000" loext:opacity="100%" style:font-name="Arial" fo:font-size="12pt" fo:background-color="#f8f8fa" loext:char-shading-value="0" style:font-family-asian="menlo" style:font-family-generic-asian="system" style:font-pitch-asian="variable" style:font-size-asian="12pt" style:font-family-complex="menlo" style:font-family-generic-complex="system" style:font-pitch-complex="variable" style:font-size-complex="12pt"/>
    </style:style>
    <style:style style:name="T13" style:family="text">
      <style:text-properties fo:color="#000000" loext:opacity="100%" style:font-name="Arial" fo:font-size="12pt" style:font-family-asian="menlo" style:font-family-generic-asian="system" style:font-pitch-asian="variable" style:font-size-asian="12pt" style:font-family-complex="menlo" style:font-family-generic-complex="system" style:font-pitch-complex="variable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arquitetura"/>Arquitetura<text:bookmark-end text:name="arquitetura"/></text:p>
      <text:p text:style-name="P2"><text:span text:style-name="T1">B</text:span>locos:</text:p>
      <text:list text:style-name="WWNum4">
        <text:list-item>
          <text:p text:style-name="P3"><text:span text:style-name="T2">Input e normalização</text:span></text:p>
        </text:list-item>
      </text:list>
      <text:list text:style-name="WWNum5">
        <text:list-item>
          <text:p text:style-name="P4"><text:span text:style-name="T3">Recebe imagem RGB.</text:span></text:p>
        </text:list-item>
        <text:list-item>
          <text:p text:style-name="P5"><text:span text:style-name="T4">Detecta contorno da placa, corrige perspectiva, estima blur/iluminação e recorta região útil. A necessidade de corrigir perspectiva e fundo antes de inspeção aparece repetidamente em pipelines com OpenCV para PCB.</text:span><text:bookmark text:name="fnref2_1"/><text:a xlink:type="simple" xlink:href="#fn2" text:style-name="ListLabel_20_71" text:visited-style-name="ListLabel_20_71"><text:span text:style-name="T5">[2]</text:span></text:a><text:bookmark text:name="fnref3"/><text:a xlink:type="simple" xlink:href="#fn3" text:style-name="ListLabel_20_72" text:visited-style-name="ListLabel_20_72"><text:span text:style-name="T5">[3]</text:span></text:a></text:p>
        </text:list-item>
      </text:list>
      <text:list text:style-name="WWNum6">
        <text:list-item>
          <text:p text:style-name="P6"><text:span text:style-name="T2">Pré-processamento clássico</text:span></text:p>
        </text:list-item>
      </text:list>
      <text:list text:style-name="WWNum7">
        <text:list-item>
          <text:p text:style-name="P7"><text:span text:style-name="T3">OpenCV para white balance, CLAHE local, supressão de sombras, sharpen leve, máscara da placa, detecção de silkscreen/cobre/solda e geração de mapas auxiliares.</text:span></text:p>
        </text:list-item>
        <text:list-item>
          <text:p text:style-name="P8"><text:span text:style-name="T4">Saída: imagem normalizada + canais derivados para o modelo. O uso de CLAHE e máscaras auxiliares já aparece em pipelines de PCB para preparar segmentação/classificação.</text:span><text:bookmark text:name="fnref4"/><text:a xlink:type="simple" xlink:href="#fn4" text:style-name="ListLabel_20_73" text:visited-style-name="ListLabel_20_73"><text:span text:style-name="T5">[4]</text:span></text:a><text:bookmark text:name="fnref2_2"/><text:a xlink:type="simple" xlink:href="#fn2" text:style-name="ListLabel_20_74" text:visited-style-name="ListLabel_20_74"><text:span text:style-name="T5">[2]</text:span></text:a></text:p>
        </text:list-item>
      </text:list>
      <text:list text:style-name="WWNum8">
        <text:list-item>
          <text:p text:style-name="P9"><text:span text:style-name="T2">Detector primário</text:span></text:p>
        </text:list-item>
      </text:list>
      <text:list text:style-name="WWNum9">
        <text:list-item>
          <text:p text:style-name="P10"><text:span text:style-name="T3">Modelo de detecção orientado a pequenas escalas, preferencialmente </text:span><text:span text:style-name="T2">YOLO com cabeça orientada ou segmentação</text:span><text:span text:style-name="T3"> para primeira passagem.</text:span></text:p>
        </text:list-item>
        <text:list-item>
          <text:p text:style-name="P11"><text:span text:style-name="T4">Responsável por gerar candidatos: CI, resistor, capacitor, diodo, transistor, conector, indutor, cristal, regulador e LED. A literatura mostra que PCBs têm objetos de 2 pixels até milhares de pixels, exigindo forte tratamento multi-escala.</text:span><text:bookmark text:name="fnref1_1"/><text:a xlink:type="simple" xlink:href="#fn1" text:style-name="ListLabel_20_75" text:visited-style-name="ListLabel_20_75"><text:span text:style-name="T6">[1]</text:span></text:a></text:p>
        </text:list-item>
      </text:list>
      <text:list text:style-name="WWNum10">
        <text:list-item>
          <text:p text:style-name="P12"><text:span text:style-name="T2">Refinador instance-level</text:span></text:p>
        </text:list-item>
      </text:list>
      <text:list text:style-name="WWNum11">
        <text:list-item>
          <text:p text:style-name="P13"><text:span text:style-name="T3">Para cada candidato, roda um refinador de máscara/contorno, com modelo de instance segmentation ou SAM-like promptable segmentation.</text:span></text:p>
        </text:list-item>
        <text:list-item>
          <text:p text:style-name="P14"><text:span text:style-name="T4">Isso melhora box, rotação, área para OCR e footprint. A combinação detecção + segmentação já foi usada em PCB com DETR/FCOS + SAM.</text:span><text:bookmark text:name="fnref1_2"/><text:a xlink:type="simple" xlink:href="#fn1" text:style-name="ListLabel_20_76" text:visited-style-name="ListLabel_20_76"><text:span text:style-name="T6">[1]</text:span></text:a></text:p>
        </text:list-item>
      </text:list>
      <text:list text:style-name="WWNum12">
        <text:list-item>
          <text:p text:style-name="P15"><text:span text:style-name="T2">Classificador hierárquico</text:span></text:p>
        </text:list-item>
      </text:list>
      <text:list text:style-name="WWNum13">
        <text:list-item>
          <text:p text:style-name="P16"><text:soft-page-break/><text:span text:style-name="T3">Classificação em dois níveis:</text:span></text:p>
          <text:list>
            <text:list-item>
              <text:p text:style-name="P16"><text:span text:style-name="T3">nível 1: classe ampla, ex. capacitor;</text:span></text:p>
            </text:list-item>
            <text:list-item>
              <text:p text:style-name="P16"><text:span text:style-name="T3">nível 2: subtipo, ex. capacitor cerâmico SMD, eletrolítico radial, tantalum moldado.</text:span></text:p>
            </text:list-item>
          </text:list>
        </text:list-item>
        <text:list-item>
          <text:p text:style-name="P16"><text:span text:style-name="T3">Para classes ambíguas, um segundo classificador recebe crop, máscara, rotação, contexto de vizinhança e texto OCR.</text:span></text:p>
        </text:list-item>
      </text:list>
      <text:list text:style-name="WWNum14">
        <text:list-item>
          <text:p text:style-name="P17"><text:span text:style-name="T2">Motor de contexto</text:span></text:p>
        </text:list-item>
      </text:list>
      <text:list text:style-name="WWNum15">
        <text:list-item>
          <text:p text:style-name="P18"><text:span text:style-name="T3">Funde pistas de:</text:span></text:p>
          <text:list>
            <text:list-item>
              <text:p text:style-name="P18"><text:span text:style-name="T3">forma e proporção;</text:span></text:p>
            </text:list-item>
            <text:list-item>
              <text:p text:style-name="P18"><text:span text:style-name="T3">pads/terminais;</text:span></text:p>
            </text:list-item>
            <text:list-item>
              <text:p text:style-name="P18"><text:span text:style-name="T3">silkscreen e reference designator;</text:span></text:p>
            </text:list-item>
            <text:list-item>
              <text:p text:style-name="P18"><text:span text:style-name="T3">OCR de marcação;</text:span></text:p>
            </text:list-item>
            <text:list-item>
              <text:p text:style-name="P18"><text:span text:style-name="T3">vizinhança elétrica/espacial.</text:span></text:p>
            </text:list-item>
          </text:list>
        </text:list-item>
        <text:list-item>
          <text:p text:style-name="P19"><text:span text:style-name="T4">Exemplo: “U23” puxa para CI/regulador; “R145” para resistor; “D8” para diodo/LED; “Q5” para transistor; “L3” para indutor; “X1/Y1” para cristal; “J1/CN1” para conector. A própria literatura de PCB destaca esses identificadores como pistas semânticas relevantes.</text:span><text:bookmark text:name="fnref1_3"/><text:a xlink:type="simple" xlink:href="#fn1" text:style-name="ListLabel_20_77" text:visited-style-name="ListLabel_20_77"><text:span text:style-name="T6">[1]</text:span></text:a></text:p>
        </text:list-item>
      </text:list>
      <text:list text:style-name="WWNum16">
        <text:list-item>
          <text:p text:style-name="P20"><text:span text:style-name="T2">Agregador e revisão</text:span></text:p>
        </text:list-item>
      </text:list>
      <text:list text:style-name="WWNum17">
        <text:list-item>
          <text:p text:style-name="P21"><text:span text:style-name="T3">Faz fusão de hipóteses, calibração de confiança, marca ambiguidades e produz JSON final.</text:span></text:p>
        </text:list-item>
        <text:list-item>
          <text:p text:style-name="P21"><text:span text:style-name="T3">Itens com baixa confiança ou conflito entre visão/OCR/contexto seguem para revisão humana.</text:span></text:p>
        </text:list-item>
      </text:list>
      <text:p text:style-name="P22"><text:bookmark-start text:name="pré_processamento"/><text:span text:style-name="T2">Pré-processamento</text:span><text:bookmark-end text:name="pré_processamento"/></text:p>
      <text:p text:style-name="P23"><text:span text:style-name="T3">O pré-processamento precisa ser forte, porque a imagem pode vir inclinada, com sombra e blur.</text:span></text:p>
      <text:p text:style-name="P22"><text:bookmark-start text:name="etapas_recomendadas"/><text:soft-page-break/><text:span text:style-name="T2">Etapas recomendadas</text:span><text:bookmark-end text:name="etapas_recomendadas"/></text:p>
      <text:list text:style-name="WWNum18">
        <text:list-item>
          <text:p text:style-name="P24"><text:span text:style-name="T3">Detecção da placa e remoção de fundo:</text:span></text:p>
          <text:list>
            <text:list-item>
              <text:p text:style-name="P24"><text:span text:style-name="T3">threshold adaptativo + contorno maior + homografia para retificação.</text:span></text:p>
            </text:list-item>
            <text:list-item>
              <text:p text:style-name="P25"><text:span text:style-name="T4">Em PCBs, corrigir perspectiva antes da análise reduz erros de fundo e alinhamento.</text:span><text:bookmark text:name="fnref3_1"/><text:a xlink:type="simple" xlink:href="#fn3" text:style-name="ListLabel_20_78" text:visited-style-name="ListLabel_20_78"><text:span text:style-name="T6">[3]</text:span></text:a></text:p>
            </text:list-item>
          </text:list>
        </text:list-item>
        <text:list-item>
          <text:p text:style-name="P24"><text:span text:style-name="T3">Normalização fotométrica:</text:span></text:p>
          <text:list>
            <text:list-item>
              <text:p text:style-name="P24"><text:span text:style-name="T3">white balance, correção gama, CLAHE em LAB/HSV, suavização de iluminação de baixa frequência.</text:span></text:p>
            </text:list-item>
          </text:list>
        </text:list-item>
        <text:list-item>
          <text:p text:style-name="P24"><text:span text:style-name="T3">Qualidade:</text:span></text:p>
          <text:list>
            <text:list-item>
              <text:p text:style-name="P24"><text:span text:style-name="T3">Laplaciano/Tenengrad para blur score; se muito baixo, marcar imagem como “baixa confiabilidade”.</text:span></text:p>
            </text:list-item>
          </text:list>
        </text:list-item>
        <text:list-item>
          <text:p text:style-name="P24"><text:span text:style-name="T3">Realce estrutural:</text:span></text:p>
          <text:list>
            <text:list-item>
              <text:p text:style-name="P24"><text:span text:style-name="T3">filtros morfológicos para destacar serigrafia, pads e leads.</text:span></text:p>
            </text:list-item>
          </text:list>
        </text:list-item>
        <text:list-item>
          <text:p text:style-name="P24"><text:span text:style-name="T3">Segmentações auxiliares por OpenCV:</text:span></text:p>
          <text:list>
            <text:list-item>
              <text:p text:style-name="P24"><text:span text:style-name="T3">máscara da placa;</text:span></text:p>
            </text:list-item>
            <text:list-item>
              <text:p text:style-name="P24"><text:span text:style-name="T3">mapa de silkscreen clara;</text:span></text:p>
            </text:list-item>
            <text:list-item>
              <text:p text:style-name="P24"><text:span text:style-name="T3">mapa de regiões metálicas/reflexivas;</text:span></text:p>
            </text:list-item>
            <text:list-item>
              <text:p text:style-name="P24"><text:span text:style-name="T3">mapa de solda/pads candidatos;</text:span></text:p>
            </text:list-item>
            <text:list-item>
              <text:p text:style-name="P24"><text:span text:style-name="T3">skeleton opcional para conectores/pinos.</text:span></text:p>
            </text:list-item>
          </text:list>
        </text:list-item>
        <text:list-item>
          <text:p text:style-name="P24"><text:span text:style-name="T3">Tiling:</text:span></text:p>
          <text:list>
            <text:list-item>
              <text:p text:style-name="P24"><text:span text:style-name="T3">inferência por blocos sobre imagens grandes, com overlap.</text:span></text:p>
            </text:list-item>
            <text:list-item>
              <text:p text:style-name="P25"><text:span text:style-name="T4">Em PCB real, tiling é importante porque as imagens são muito maiores que datasets comuns e os componentes variam demais de tamanho.</text:span><text:bookmark text:name="fnref1_4"/><text:a xlink:type="simple" xlink:href="#fn1" text:style-name="ListLabel_20_79" text:visited-style-name="ListLabel_20_79"><text:span text:style-name="T6">[1]</text:span></text:a></text:p>
            </text:list-item>
          </text:list>
        </text:list-item>
      </text:list>
      <text:p text:style-name="P22"><text:bookmark-start text:name="uso_combinado_opencv_deep_learning"/><text:span text:style-name="T2">Uso combinado OpenCV + deep learning</text:span><text:bookmark-end text:name="uso_combinado_opencv_deep_learning"/></text:p>
      <text:p text:style-name="P23"><text:soft-page-break/><text:span text:style-name="T3">OpenCV deve atuar como </text:span><text:span text:style-name="T2">pré-condicionador</text:span><text:span text:style-name="T3"> e também como gerador de atributos:</text:span></text:p>
      <text:list text:style-name="WWNum19">
        <text:list-item>
          <text:p text:style-name="P26"><text:span text:style-name="T3">corrige geometria;</text:span></text:p>
        </text:list-item>
        <text:list-item>
          <text:p text:style-name="P26"><text:span text:style-name="T3">mede retangularidade, circularidade, razão de aspecto, orientação via PCA/minAreaRect;</text:span></text:p>
        </text:list-item>
        <text:list-item>
          <text:p text:style-name="P26"><text:span text:style-name="T3">estima presença de terminais/pads;</text:span></text:p>
        </text:list-item>
        <text:list-item>
          <text:p text:style-name="P26"><text:span text:style-name="T3">entrega ROI de OCR;</text:span></text:p>
        </text:list-item>
        <text:list-item>
          <text:p text:style-name="P26"><text:span text:style-name="T3">filtra falsos positivos óbvios.</text:span></text:p>
        </text:list-item>
      </text:list>
      <text:p text:style-name="P23"><text:span text:style-name="T3">O modelo deep learning faz o que OpenCV não faz bem sozinho:</text:span></text:p>
      <text:list text:style-name="WWNum20">
        <text:list-item>
          <text:p text:style-name="P27"><text:span text:style-name="T3">robustez a oclusão;</text:span></text:p>
        </text:list-item>
        <text:list-item>
          <text:p text:style-name="P27"><text:span text:style-name="T3">generalização entre placas;</text:span></text:p>
        </text:list-item>
        <text:list-item>
          <text:p text:style-name="P27"><text:span text:style-name="T3">distinção entre classes visualmente próximas;</text:span></text:p>
        </text:list-item>
        <text:list-item>
          <text:p text:style-name="P28"><text:span text:style-name="T4">segmentação sob textura e iluminação variáveis.</text:span><text:bookmark text:name="fnref2_3"/><text:a xlink:type="simple" xlink:href="#fn2" text:style-name="ListLabel_20_80" text:visited-style-name="ListLabel_20_80"><text:span text:style-name="T5">[2]</text:span></text:a><text:bookmark text:name="fnref3_2"/><text:a xlink:type="simple" xlink:href="#fn3" text:style-name="ListLabel_20_81" text:visited-style-name="ListLabel_20_81"><text:span text:style-name="T5">[3]</text:span></text:a><text:bookmark text:name="fnref1_5"/><text:a xlink:type="simple" xlink:href="#fn1" text:style-name="ListLabel_20_82" text:visited-style-name="ListLabel_20_82"><text:span text:style-name="T5">[1]</text:span></text:a></text:p>
        </text:list-item>
      </text:list>
      <text:p text:style-name="P22"><text:bookmark-start text:name="yolo_detr_e_segmentação"/><text:span text:style-name="T2">YOLO, DETR e segmentação</text:span><text:bookmark-end text:name="yolo_detr_e_segmentação"/>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29"><text:span text:style-name="T7">Método</text:span></text:p>
          </table:table-cell>
          <table:table-cell table:style-name="Tabela1.B1" office:value-type="string">
            <text:p text:style-name="P29"><text:span text:style-name="T7">Pontos fortes</text:span></text:p>
          </table:table-cell>
          <table:table-cell table:style-name="Tabela1.B1" office:value-type="string">
            <text:p text:style-name="P29"><text:span text:style-name="T7">Pontos fracos</text:span></text:p>
          </table:table-cell>
          <table:table-cell table:style-name="Tabela1.D1" office:value-type="string">
            <text:p text:style-name="P29"><text:span text:style-name="T7">Onde eu usaria</text:span></text:p>
          </table:table-cell>
        </table:table-row>
        <table:table-row table:style-name="Tabela1.1">
          <table:table-cell table:style-name="Tabela1.A1" office:value-type="string">
            <text:p text:style-name="P29"><text:span text:style-name="T2">YOLO</text:span></text:p>
          </table:table-cell>
          <table:table-cell table:style-name="Tabela1.B1" office:value-type="string">
            <text:p text:style-name="P30"><text:span text:style-name="T8">Muito rápido, bom para produção, fácil de treinar, ótimo para primeira triagem multi-classe. </text:span><text:a xlink:type="simple" xlink:href="#fn5" text:style-name="ListLabel_20_83" text:visited-style-name="ListLabel_20_83"><text:span text:style-name="T6">[5]</text:span></text:a></text:p>
          </table:table-cell>
          <table:table-cell table:style-name="Tabela1.B1" office:value-type="string">
            <text:p text:style-name="P30"><text:span text:style-name="T8">Pode sofrer em objetos minúsculos, caixas apertadas e forte ambiguidade sem refinamento. </text:span><text:a xlink:type="simple" xlink:href="#fn1" text:style-name="ListLabel_20_84" text:visited-style-name="ListLabel_20_84"><text:span text:style-name="T6">[1]</text:span></text:a></text:p>
          </table:table-cell>
          <table:table-cell table:style-name="Tabela1.D1" office:value-type="string">
            <text:p text:style-name="P29"><text:span text:style-name="T7">Detector primário em tempo quase real.</text:span></text:p>
          </table:table-cell>
        </table:table-row>
        <text:soft-page-break/>
        <table:table-row table:style-name="Tabela1.1">
          <table:table-cell table:style-name="Tabela1.A1" office:value-type="string">
            <text:p text:style-name="P29"><text:span text:style-name="T2">DETR</text:span></text:p>
          </table:table-cell>
          <table:table-cell table:style-name="Tabela1.B1" office:value-type="string">
            <text:p text:style-name="P30"><text:span text:style-name="T8">Modela contexto global, evita NMS clássico, tende a gerar boxes melhores para componentes muito grandes. </text:span><text:a xlink:type="simple" xlink:href="#fn6" text:style-name="ListLabel_20_85" text:visited-style-name="ListLabel_20_85"><text:span text:style-name="T9">[6]</text:span></text:a><text:a xlink:type="simple" xlink:href="#fn1" text:style-name="ListLabel_20_86" text:visited-style-name="ListLabel_20_86"><text:span text:style-name="T9">[1]</text:span></text:a></text:p>
          </table:table-cell>
          <table:table-cell table:style-name="Tabela1.B1" office:value-type="string">
            <text:p text:style-name="P30"><text:span text:style-name="T8">Historicamente mais fraco em pequenos objetos em PCB e mais custoso/mais delicado para ajustar. </text:span><text:a xlink:type="simple" xlink:href="#fn1" text:style-name="ListLabel_20_87" text:visited-style-name="ListLabel_20_87"><text:span text:style-name="T6">[1]</text:span></text:a></text:p>
          </table:table-cell>
          <table:table-cell table:style-name="Tabela1.D1" office:value-type="string">
            <text:p text:style-name="P29"><text:span text:style-name="T7">Segundo estágio para placas complexas ou objetos grandes como conectores longos e módulos.</text:span></text:p>
          </table:table-cell>
        </table:table-row>
        <table:table-row table:style-name="Tabela1.1">
          <table:table-cell table:style-name="Tabela1.A1" office:value-type="string">
            <text:p text:style-name="P29"><text:span text:style-name="T2">Instance segmentation</text:span></text:p>
          </table:table-cell>
          <table:table-cell table:style-name="Tabela1.B1" office:value-type="string">
            <text:p text:style-name="P30"><text:span text:style-name="T8">Entrega máscara, ângulo, contorno, área útil para OCR e footprint; melhor para package. </text:span><text:a xlink:type="simple" xlink:href="#fn1" text:style-name="ListLabel_20_88" text:visited-style-name="ListLabel_20_88"><text:span text:style-name="T9">[1]</text:span></text:a><text:a xlink:type="simple" xlink:href="#fn1" text:style-name="ListLabel_20_89" text:visited-style-name="ListLabel_20_89"><text:span text:style-name="T9">[1]</text:span></text:a></text:p>
          </table:table-cell>
          <table:table-cell table:style-name="Tabela1.B1" office:value-type="string">
            <text:p text:style-name="P30"><text:span text:style-name="T8">Anotação mais cara, inferência mais lenta. </text:span><text:a xlink:type="simple" xlink:href="#fn1" text:style-name="ListLabel_20_90" text:visited-style-name="ListLabel_20_90"><text:span text:style-name="T6">[1]</text:span></text:a></text:p>
          </table:table-cell>
          <table:table-cell table:style-name="Tabela1.D1" office:value-type="string">
            <text:p text:style-name="P29"><text:span text:style-name="T7">Refinador dos candidatos e saída final de alto valor.</text:span></text:p>
          </table:table-cell>
        </table:table-row>
      </table:table>
      <text:p text:style-name="P31"/>
      <text:p text:style-name="P22"><text:bookmark-start text:name="decisão_prática"/><text:span text:style-name="T2">Decisão prática</text:span><text:bookmark-end text:name="decisão_prática"/></text:p>
      <text:p text:style-name="P23"><text:span text:style-name="T3">Minha escolha para o módulo seria:</text:span></text:p>
      <text:list text:style-name="WWNum21">
        <text:list-item>
          <text:p text:style-name="P32"><text:span text:style-name="T2">Produção padrão</text:span><text:span text:style-name="T3">: YOLO-seg ou YOLO + segmentador leve.</text:span></text:p>
        </text:list-item>
        <text:list-item>
          <text:p text:style-name="P32"><text:span text:style-name="T2">Cenário com muitos conectores grandes / módulos / precisão de contorno</text:span><text:span text:style-name="T3">: adicionar estágio DETR ou RT-DETR-like para rechecagem.</text:span></text:p>
        </text:list-item>
        <text:list-item>
          <text:p text:style-name="P33"><text:span text:style-name="T10">Saída final exigida pelo seu caso</text:span><text:span text:style-name="T4">: precisa de máscara, rotação e OCR ROI; portanto, </text:span><text:span text:style-name="T10">instance-level segmentation é a saída ideal</text:span><text:span text:style-name="T4">, mesmo que o detector inicial seja YOLO.</text:span><text:bookmark text:name="fnref1_12"/><text:a xlink:type="simple" xlink:href="#fn1" text:style-name="ListLabel_20_91" text:visited-style-name="ListLabel_20_91"><text:span text:style-name="T6">[1]</text:span></text:a></text:p>
        </text:list-item>
      </text:list>
      <text:p text:style-name="P22"><text:bookmark-start text:name="dataset"/><text:span text:style-name="T2">Dataset</text:span><text:bookmark-end text:name="dataset"/></text:p>
      <text:p text:style-name="P34"><text:span text:style-name="T4">A estratégia de dataset é tão importante quanto a arquitetura, porque PCBs sofrem com desbalanceamento forte, poucos dados públicos e enorme diversidade visual.</text:span><text:bookmark text:name="fnref2_4"/><text:a xlink:type="simple" xlink:href="#fn2" text:style-name="ListLabel_20_92" text:visited-style-name="ListLabel_20_92"><text:span text:style-name="T11">[2]</text:span></text:a><text:bookmark text:name="fnref1_13"/><text:a xlink:type="simple" xlink:href="#fn1" text:style-name="ListLabel_20_93" text:visited-style-name="ListLabel_20_93"><text:span text:style-name="T11">[1]</text:span></text:a></text:p>
      <text:p text:style-name="P22"><text:bookmark-start text:name="fontes"/><text:span text:style-name="T2">Fontes</text:span><text:bookmark-end text:name="fontes"/></text:p>
      <text:list text:style-name="WWNum22">
        <text:list-item>
          <text:p text:style-name="P35"><text:span text:style-name="T3">Fotos próprias do pipeline alvo.</text:span></text:p>
        </text:list-item>
        <text:list-item>
          <text:p text:style-name="P36"><text:soft-page-break/><text:span text:style-name="T4">Conjuntos públicos como FICS-PCB e outros datasets de PCB/componentes. O FICS-PCB é citado como base relevante com milhares de imagens/componentes anotados.</text:span><text:bookmark text:name="fnref4_1"/><text:a xlink:type="simple" xlink:href="#fn4" text:style-name="ListLabel_20_94" text:visited-style-name="ListLabel_20_94"><text:span text:style-name="T5">[4]</text:span></text:a><text:bookmark text:name="fnref2_5"/><text:a xlink:type="simple" xlink:href="#fn2" text:style-name="ListLabel_20_95" text:visited-style-name="ListLabel_20_95"><text:span text:style-name="T5">[2]</text:span></text:a></text:p>
        </text:list-item>
        <text:list-item>
          <text:p text:style-name="P35"><text:span text:style-name="T3">Dados sintéticos controlados:</text:span></text:p>
          <text:list>
            <text:list-item>
              <text:p text:style-name="P35"><text:span text:style-name="T3">variações de brilho, balanço, sombra, desfoque, compressão JPEG, perspectiva;</text:span></text:p>
            </text:list-item>
            <text:list-item>
              <text:p text:style-name="P35"><text:span text:style-name="T3">copy-paste de componentes com composição realista sobre placas;</text:span></text:p>
            </text:list-item>
            <text:list-item>
              <text:p text:style-name="P35"><text:span text:style-name="T3">domain randomization moderada.</text:span></text:p>
            </text:list-item>
          </text:list>
        </text:list-item>
      </text:list>
      <text:p text:style-name="P22"><text:bookmark-start text:name="estratégia_de_anotação"/><text:span text:style-name="T2">Estratégia de anotação</text:span><text:bookmark-end text:name="estratégia_de_anotação"/></text:p>
      <text:p text:style-name="P23"><text:span text:style-name="T3">Para cada componente, eu anotaria:</text:span></text:p>
      <text:list text:style-name="WWNum23">
        <text:list-item>
          <text:p text:style-name="P37"><text:span text:style-name="T3">bounding box orientada;</text:span></text:p>
        </text:list-item>
        <text:list-item>
          <text:p text:style-name="P37"><text:span text:style-name="T3">máscara instance-level;</text:span></text:p>
        </text:list-item>
        <text:list-item>
          <text:p text:style-name="P37"><text:span text:style-name="T3">classe;</text:span></text:p>
        </text:list-item>
        <text:list-item>
          <text:p text:style-name="P37"><text:span text:style-name="T3">subtipo;</text:span></text:p>
        </text:list-item>
        <text:list-item>
          <text:p text:style-name="P37"><text:span text:style-name="T3">package/footprint provável;</text:span></text:p>
        </text:list-item>
        <text:list-item>
          <text:p text:style-name="P37"><text:span text:style-name="T3">lado da placa;</text:span></text:p>
        </text:list-item>
        <text:list-item>
          <text:p text:style-name="P37"><text:span text:style-name="T3">rotação;</text:span></text:p>
        </text:list-item>
        <text:list-item>
          <text:p text:style-name="P37"><text:span text:style-name="T3">OCR region;</text:span></text:p>
        </text:list-item>
        <text:list-item>
          <text:p text:style-name="P37"><text:span text:style-name="T3">visibilidade/oclusão;</text:span></text:p>
        </text:list-item>
        <text:list-item>
          <text:p text:style-name="P37"><text:span text:style-name="T3">grau de certeza do anotador.</text:span></text:p>
        </text:list-item>
      </text:list>
      <text:p text:style-name="P22"><text:bookmark-start text:name="taxonomia"/><text:span text:style-name="T2">Taxonomia</text:span><text:bookmark-end text:name="taxonomia"/></text:p>
      <text:p text:style-name="P23"><text:span text:style-name="T3">Use rótulo hierárquico:</text:span></text:p>
      <text:list text:style-name="WWNum24">
        <text:list-item>
          <text:p text:style-name="P38"><text:span text:style-name="T3">classe base: resistor, capacitor, diodo, transistor, etc.;</text:span></text:p>
        </text:list-item>
        <text:list-item>
          <text:p text:style-name="P38"><text:soft-page-break/><text:span text:style-name="T3">subtipo: chip resistor, resistor axial; ceramic MLCC, electrolytic radial, tantalum; SOT-23 transistor; SOIC/TQFP/QFN IC etc.;</text:span></text:p>
        </text:list-item>
        <text:list-item>
          <text:p text:style-name="P38"><text:span text:style-name="T3">montagem: SMD/PTH;</text:span></text:p>
        </text:list-item>
        <text:list-item>
          <text:p text:style-name="P38"><text:span text:style-name="T3">footprint/package: 0402, 0603, 0805, SOT-23, SOT-223, TO-220, SOIC-8, QFP-64, DIP-14, radial can, USB-A, pin header.</text:span></text:p>
        </text:list-item>
      </text:list>
      <text:p text:style-name="P22"><text:bookmark-start text:name="split_correto"/><text:span text:style-name="T2">Split correto</text:span><text:bookmark-end text:name="split_correto"/></text:p>
      <text:list text:style-name="WWNum25">
        <text:list-item>
          <text:p text:style-name="P39"><text:span text:style-name="T2">Por placa</text:span><text:span text:style-name="T3">, nunca por crop aleatório, para evitar vazamento.</text:span></text:p>
        </text:list-item>
        <text:list-item>
          <text:p text:style-name="P39"><text:span text:style-name="T3">Train/val/test com boards distintos, marcas distintas e condições distintas.</text:span></text:p>
        </text:list-item>
        <text:list-item>
          <text:p text:style-name="P39"><text:span text:style-name="T3">Separar um conjunto “hard case”: sombra, blur, oclusão, serigrafia parcial, placa preta.</text:span></text:p>
        </text:list-item>
      </text:list>
      <text:p text:style-name="P22"><text:bookmark-start text:name="balanceamento"/><text:span text:style-name="T2">Balanceamento</text:span><text:bookmark-end text:name="balanceamento"/></text:p>
      <text:p text:style-name="P34"><text:span text:style-name="T4">Datasets de PCB tendem a ser altamente desbalanceados, com resistores/capacitores dominando e classes raras sofrendo.</text:span><text:bookmark text:name="fnref2_6"/><text:a xlink:type="simple" xlink:href="#fn2" text:style-name="ListLabel_20_96" text:visited-style-name="ListLabel_20_96"><text:span text:style-name="T11">[2]</text:span></text:a><text:bookmark text:name="fnref1_14"/><text:a xlink:type="simple" xlink:href="#fn1" text:style-name="ListLabel_20_97" text:visited-style-name="ListLabel_20_97"><text:span text:style-name="T11">[1]</text:span></text:a><text:span text:style-name="T4"><text:line-break/>Use:</text:span></text:p>
      <text:list text:style-name="WWNum26">
        <text:list-item>
          <text:p text:style-name="P40"><text:span text:style-name="T3">oversampling de raras;</text:span></text:p>
        </text:list-item>
        <text:list-item>
          <text:p text:style-name="P40"><text:span text:style-name="T3">class-balanced loss;</text:span></text:p>
        </text:list-item>
        <text:list-item>
          <text:p text:style-name="P40"><text:span text:style-name="T3">focal loss;</text:span></text:p>
        </text:list-item>
        <text:list-item>
          <text:p text:style-name="P40"><text:span text:style-name="T3">hard negative mining;</text:span></text:p>
        </text:list-item>
        <text:list-item>
          <text:p text:style-name="P40"><text:span text:style-name="T3">curriculum: treino base em classes amplas, depois fino em classes raras.</text:span></text:p>
        </text:list-item>
      </text:list>
      <text:p text:style-name="P22"><text:bookmark-start text:name="treinamento"/><text:span text:style-name="T2">Treinamento</text:span><text:bookmark-end text:name="treinamento"/></text:p>
      <text:p text:style-name="P22"><text:bookmark-start text:name="estratégia"/><text:span text:style-name="T2">Estratégia</text:span><text:bookmark-end text:name="estratégia"/></text:p>
      <text:p text:style-name="P23"><text:span text:style-name="T3">Eu treinaria em 3 níveis:</text:span></text:p>
      <text:list text:style-name="WWNum27">
        <text:list-item>
          <text:p text:style-name="P41"><text:span text:style-name="T2">Detector geral</text:span></text:p>
        </text:list-item>
      </text:list>
      <text:list text:style-name="WWNum28">
        <text:list-item>
          <text:p text:style-name="P42"><text:soft-page-break/><text:span text:style-name="T3">Treino multi-classe com imagens retificadas + tiles.</text:span></text:p>
        </text:list-item>
        <text:list-item>
          <text:p text:style-name="P42"><text:span text:style-name="T3">Augmentations:</text:span></text:p>
          <text:list>
            <text:list-item>
              <text:p text:style-name="P42"><text:span text:style-name="T3">rotação livre;</text:span></text:p>
            </text:list-item>
            <text:list-item>
              <text:p text:style-name="P42"><text:span text:style-name="T3">perspective warp;</text:span></text:p>
            </text:list-item>
            <text:list-item>
              <text:p text:style-name="P42"><text:span text:style-name="T3">brilho/contraste/gama;</text:span></text:p>
            </text:list-item>
            <text:list-item>
              <text:p text:style-name="P42"><text:span text:style-name="T3">sombras sintéticas;</text:span></text:p>
            </text:list-item>
            <text:list-item>
              <text:p text:style-name="P42"><text:span text:style-name="T3">motion blur/defocus blur;</text:span></text:p>
            </text:list-item>
            <text:list-item>
              <text:p text:style-name="P42"><text:span text:style-name="T3">cutout/oclusão parcial;</text:span></text:p>
            </text:list-item>
            <text:list-item>
              <text:p text:style-name="P42"><text:span text:style-name="T3">compressão e ruído;</text:span></text:p>
            </text:list-item>
            <text:list-item>
              <text:p text:style-name="P42"><text:span text:style-name="T3">mixup/copy-paste com cuidado.</text:span></text:p>
            </text:list-item>
          </text:list>
        </text:list-item>
      </text:list>
      <text:list text:style-name="WWNum29">
        <text:list-item>
          <text:p text:style-name="P43"><text:span text:style-name="T2">Segmentador/refinador</text:span></text:p>
        </text:list-item>
      </text:list>
      <text:list text:style-name="WWNum30">
        <text:list-item>
          <text:p text:style-name="P44"><text:span text:style-name="T3">Treino instance-level em crops ou tiles centrados nos componentes.</text:span></text:p>
        </text:list-item>
        <text:list-item>
          <text:p text:style-name="P44"><text:span text:style-name="T3">Objetivo: máscara precisa, rotação estável, contorno para footprint.</text:span></text:p>
        </text:list-item>
      </text:list>
      <text:list text:style-name="WWNum31">
        <text:list-item>
          <text:p text:style-name="P45"><text:span text:style-name="T2">Classificador fino + package</text:span></text:p>
        </text:list-item>
      </text:list>
      <text:list text:style-name="WWNum32">
        <text:list-item>
          <text:p text:style-name="P46"><text:span text:style-name="T3">Recebe crop normalizado pela orientação.</text:span></text:p>
        </text:list-item>
        <text:list-item>
          <text:p text:style-name="P46"><text:span text:style-name="T3">Entradas multi-ramo:</text:span></text:p>
          <text:list>
            <text:list-item>
              <text:p text:style-name="P46"><text:span text:style-name="T3">RGB do componente;</text:span></text:p>
            </text:list-item>
            <text:list-item>
              <text:p text:style-name="P46"><text:span text:style-name="T3">máscara;</text:span></text:p>
            </text:list-item>
            <text:list-item>
              <text:p text:style-name="P46"><text:span text:style-name="T3">OCR crop;</text:span></text:p>
            </text:list-item>
            <text:list-item>
              <text:p text:style-name="P46"><text:span text:style-name="T3">contexto local ampliado;</text:span></text:p>
            </text:list-item>
            <text:list-item>
              <text:p text:style-name="P46"><text:span text:style-name="T3">features geométricas do OpenCV.</text:span></text:p>
            </text:list-item>
          </text:list>
        </text:list-item>
      </text:list>
      <text:p text:style-name="P22"><text:bookmark-start text:name="transfer_learning"/><text:span text:style-name="T2">Transfer learning</text:span><text:bookmark-end text:name="transfer_learning"/></text:p>
      <text:p text:style-name="P34"><text:soft-page-break/><text:span text:style-name="T4">Transfer learning é muito útil quando há poucos dados PCB anotados, e estudos em PCB destacam seu impacto positivo.</text:span><text:bookmark text:name="fnref1_15"/><text:a xlink:type="simple" xlink:href="#fn1" text:style-name="ListLabel_20_98" text:visited-style-name="ListLabel_20_98"><text:span text:style-name="T6">[1]</text:span></text:a><text:span text:style-name="T4"><text:line-break/>Comece com pesos pré-treinados em COCO/ImageNet e faça fine-tuning progressivo:</text:span></text:p>
      <text:list text:style-name="WWNum33">
        <text:list-item>
          <text:p text:style-name="P47"><text:span text:style-name="T3">backbone congelado;</text:span></text:p>
        </text:list-item>
        <text:list-item>
          <text:p text:style-name="P47"><text:span text:style-name="T3">descongelamento parcial;</text:span></text:p>
        </text:list-item>
        <text:list-item>
          <text:p text:style-name="P47"><text:span text:style-name="T3">fine-tuning full com LR baixo.</text:span></text:p>
        </text:list-item>
      </text:list>
      <text:p text:style-name="P22"><text:bookmark-start text:name="rótulo_ambíguo_no_treino"/><text:span text:style-name="T2">Rótulo ambíguo no treino</text:span><text:bookmark-end text:name="rótulo_ambíguo_no_treino"/></text:p>
      <text:p text:style-name="P23"><text:span text:style-name="T3">Crie uma classe temporária tipo:</text:span></text:p>
      <text:list text:style-name="WWNum34">
        <text:list-item>
          <text:p text:style-name="P48"><text:span text:style-name="Verbatim_20_Char"><text:span text:style-name="T12">transistor_or_diode</text:span></text:span></text:p>
        </text:list-item>
        <text:list-item>
          <text:p text:style-name="P48"><text:span text:style-name="Verbatim_20_Char"><text:span text:style-name="T12">led_or_diode</text:span></text:span></text:p>
        </text:list-item>
        <text:list-item>
          <text:p text:style-name="P48"><text:span text:style-name="Verbatim_20_Char"><text:span text:style-name="T12">resistor_or_inductor_chip</text:span></text:span><text:span text:style-name="T4"><text:line-break/>quando a imagem não resolve o caso. Um trabalho em PCB relata explicitamente classe ambígua como </text:span><text:span text:style-name="Verbatim_20_Char"><text:span text:style-name="T12">q_or_d</text:span></text:span><text:span text:style-name="T4"> para transistor ou diodo.</text:span><text:bookmark text:name="fnref1_16"/><text:a xlink:type="simple" xlink:href="#fn1" text:style-name="ListLabel_20_99" text:visited-style-name="ListLabel_20_99"><text:span text:style-name="T6">[1]</text:span></text:a></text:p>
        </text:list-item>
      </text:list>
      <text:p text:style-name="P23"><text:span text:style-name="T3">Depois, refine com:</text:span></text:p>
      <text:list text:style-name="WWNum35">
        <text:list-item>
          <text:p text:style-name="P49"><text:span text:style-name="T3">OCR;</text:span></text:p>
        </text:list-item>
        <text:list-item>
          <text:p text:style-name="P49"><text:span text:style-name="T3">referência;</text:span></text:p>
        </text:list-item>
        <text:list-item>
          <text:p text:style-name="P49"><text:span text:style-name="T3">package;</text:span></text:p>
        </text:list-item>
        <text:list-item>
          <text:p text:style-name="P49"><text:span text:style-name="T3">contexto;</text:span></text:p>
        </text:list-item>
        <text:list-item>
          <text:p text:style-name="P49"><text:span text:style-name="T3">revisão humana.</text:span></text:p>
        </text:list-item>
      </text:list>
      <text:p text:style-name="P22"><text:bookmark-start text:name="inferência"/><text:span text:style-name="T2">Inferência</text:span><text:bookmark-end text:name="inferência"/></text:p>
      <text:p text:style-name="P22"><text:bookmark-start text:name="fluxo_sugerido"/><text:span text:style-name="T2">Fluxo sugerido</text:span><text:bookmark-end text:name="fluxo_sugerido"/></text:p>
      <text:list text:style-name="WWNum36">
        <text:list-item>
          <text:p text:style-name="P50"><text:span text:style-name="T3">Retificar placa e gerar tiles.</text:span></text:p>
        </text:list-item>
        <text:list-item>
          <text:p text:style-name="P50"><text:span text:style-name="T3">Rodar detector primário.</text:span></text:p>
        </text:list-item>
        <text:list-item>
          <text:p text:style-name="P50"><text:soft-page-break/><text:span text:style-name="T3">Unir predições entre tiles com weighted box fusion ou mask fusion.</text:span></text:p>
        </text:list-item>
        <text:list-item>
          <text:p text:style-name="P50"><text:span text:style-name="T3">Para cada candidato:</text:span></text:p>
        </text:list-item>
      </text:list>
      <text:list text:style-name="WWNum37">
        <text:list-item>
          <text:p text:style-name="P51"><text:span text:style-name="T3">refinar máscara;</text:span></text:p>
        </text:list-item>
        <text:list-item>
          <text:p text:style-name="P51"><text:span text:style-name="T3">estimar rotação;</text:span></text:p>
        </text:list-item>
        <text:list-item>
          <text:p text:style-name="P51"><text:span text:style-name="T3">calcular descritores geométricos;</text:span></text:p>
        </text:list-item>
        <text:list-item>
          <text:p text:style-name="P51"><text:span text:style-name="T3">extrair ROI de OCR;</text:span></text:p>
        </text:list-item>
        <text:list-item>
          <text:p text:style-name="P51"><text:span text:style-name="T3">classificar subtipo/package;</text:span></text:p>
        </text:list-item>
        <text:list-item>
          <text:p text:style-name="P51"><text:span text:style-name="T3">ler referência/silkscreen próxima.</text:span></text:p>
        </text:list-item>
      </text:list>
      <text:list text:style-name="WWNum38">
        <text:list-item>
          <text:p text:style-name="P52"><text:span text:style-name="T3">Rodar grafo de contexto:</text:span></text:p>
        </text:list-item>
      </text:list>
      <text:list text:style-name="WWNum39">
        <text:list-item>
          <text:p text:style-name="P53"><text:span text:style-name="T3">componente perto de cristal oscilador + CI principal;</text:span></text:p>
        </text:list-item>
        <text:list-item>
          <text:p text:style-name="P53"><text:span text:style-name="T3">conector alinhado a borda;</text:span></text:p>
        </text:list-item>
        <text:list-item>
          <text:p text:style-name="P53"><text:span text:style-name="T3">regulador perto de capacitores de desacoplamento;</text:span></text:p>
        </text:list-item>
        <text:list-item>
          <text:p text:style-name="P53"><text:span text:style-name="T3">LED perto de resistor série;</text:span></text:p>
        </text:list-item>
        <text:list-item>
          <text:p text:style-name="P53"><text:span text:style-name="T3">transistor/MOSFET perto de áreas de potência;</text:span></text:p>
        </text:list-item>
        <text:list-item>
          <text:p text:style-name="P53"><text:span text:style-name="T3">CI perto de pinos uniformes/pads perimetrais.</text:span></text:p>
        </text:list-item>
      </text:list>
      <text:list text:style-name="WWNum40">
        <text:list-item>
          <text:p text:style-name="P54"><text:span text:style-name="T3">Calibrar confiança.</text:span></text:p>
        </text:list-item>
        <text:list-item>
          <text:p text:style-name="P54"><text:span text:style-name="T3">Marcar casos para revisão.</text:span></text:p>
        </text:list-item>
      </text:list>
      <text:p text:style-name="P22"><text:bookmark-start text:name="identificação_de_package_footprint"/><text:span text:style-name="T2">Identificação de package/footprint</text:span><text:bookmark-end text:name="identificação_de_package_footprint"/></text:p>
      <text:p text:style-name="P23"><text:span text:style-name="T3">Essa parte não pode depender só da classe.</text:span></text:p>
      <text:p text:style-name="P23"><text:span text:style-name="T3">Eu usaria um classificador dedicado de package com estas entradas:</text:span></text:p>
      <text:list text:style-name="WWNum41">
        <text:list-item>
          <text:p text:style-name="P55"><text:span text:style-name="T3">crop orientado;</text:span></text:p>
        </text:list-item>
        <text:list-item>
          <text:p text:style-name="P55"><text:span text:style-name="T3">máscara;</text:span></text:p>
        </text:list-item>
        <text:list-item>
          <text:p text:style-name="P55"><text:soft-page-break/><text:span text:style-name="T3">contorno;</text:span></text:p>
        </text:list-item>
        <text:list-item>
          <text:p text:style-name="P55"><text:span text:style-name="T3">número e distribuição de terminais visíveis;</text:span></text:p>
        </text:list-item>
        <text:list-item>
          <text:p text:style-name="P55"><text:span text:style-name="T3">razão largura/altura;</text:span></text:p>
        </text:list-item>
        <text:list-item>
          <text:p text:style-name="P55"><text:span text:style-name="T3">tamanho relativo em pixels, corrigido por escala da placa;</text:span></text:p>
        </text:list-item>
        <text:list-item>
          <text:p text:style-name="P55"><text:span text:style-name="T3">proximidade/forma dos pads;</text:span></text:p>
        </text:list-item>
        <text:list-item>
          <text:p text:style-name="P55"><text:span text:style-name="T3">presença de furos metalizados para PTH.</text:span></text:p>
        </text:list-item>
      </text:list>
      <text:p text:style-name="P23"><text:span text:style-name="T3">Exemplos:</text:span></text:p>
      <text:list text:style-name="WWNum42">
        <text:list-item>
          <text:p text:style-name="P56"><text:span text:style-name="T3">0402/0603/0805: classe “chip passive” com tamanho relativo e distância entre pads.</text:span></text:p>
        </text:list-item>
        <text:list-item>
          <text:p text:style-name="P56"><text:span text:style-name="T3">SOT-23: corpo pequeno + 3 terminais.</text:span></text:p>
        </text:list-item>
        <text:list-item>
          <text:p text:style-name="P56"><text:span text:style-name="T3">SOT-223: aba metálica + 3 leads.</text:span></text:p>
        </text:list-item>
        <text:list-item>
          <text:p text:style-name="P56"><text:span text:style-name="T3">SOIC/TSSOP/QFN/QFP: número e distribuição de lados com terminais.</text:span></text:p>
        </text:list-item>
        <text:list-item>
          <text:p text:style-name="P56"><text:span text:style-name="T3">TO-220: corpo PTH maior, 3 pinos, possível aba metálica.</text:span></text:p>
        </text:list-item>
        <text:list-item>
          <text:p text:style-name="P56"><text:span text:style-name="T3">Cristal SMD: lata metálica retangular/elíptica, normalmente próximo a MCU/clock.</text:span></text:p>
        </text:list-item>
      </text:list>
      <text:p text:style-name="P23"><text:span text:style-name="T3">Sem calibração de escala, package provável será apenas </text:span><text:span text:style-name="T2">probabilístico</text:span><text:span text:style-name="T3">, não determinístico.</text:span></text:p>
      <text:p text:style-name="P22"><text:bookmark-start text:name="json_de_saída"/><text:span text:style-name="T2">JSON de saída</text:span><text:bookmark-end text:name="json_de_saída"/></text:p>
      <text:p text:style-name="P57"><text:span text:style-name="Verbatim_20_Char"><text:span text:style-name="T13">{<text:line-break/> <text:s/>"image_id": "board_000123_top",<text:line-break/> <text:s/>"board_side": "top",<text:line-break/> <text:s/>"components": [<text:line-break/> <text:s text:c="3"/>{<text:line-break/> <text:s text:c="5"/>"component_id": "cmp_0001",<text:line-break/> <text:s text:c="5"/>"class": "capacitor",<text:line-break/> <text:s text:c="5"/>"subtype": "ceramic_mltcc_smd",<text:line-break/> <text:s text:c="5"/>"package_probable": {<text:line-break/></text:span></text:span><text:soft-page-break/><text:span text:style-name="Verbatim_20_Char"><text:span text:style-name="T13"> <text:s text:c="7"/>"name": "0603",<text:line-break/> <text:s text:c="7"/>"confidence": 0.78<text:line-break/> <text:s text:c="5"/>},<text:line-break/> <text:s text:c="5"/>"mount_type": "SMD",<text:line-break/> <text:s text:c="5"/>"bbox_xyxy": [412.4, 233.1, 458.7, 261.9],<text:line-break/> <text:s text:c="5"/>"bbox_rotated_cxcywh_angle": [435.6, 247.5, 46.3, 28.8, -12.4],<text:line-break/> <text:s text:c="5"/>"mask_rle": "encoded_mask_here",<text:line-break/> <text:s text:c="5"/>"rotation_deg": -12.4,<text:line-break/> <text:s text:c="5"/>"confidence": {<text:line-break/> <text:s text:c="7"/>"detection": 0.96,<text:line-break/> <text:s text:c="7"/>"classification": 0.88,<text:line-break/> <text:s text:c="7"/>"package": 0.78,<text:line-break/> <text:s text:c="7"/>"overall": 0.84<text:line-break/> <text:s text:c="5"/>},<text:line-break/> <text:s text:c="5"/>"ocr_region": {<text:line-break/> <text:s text:c="7"/>"bbox_xyxy": [404.0, 226.0, 466.0, 269.0],<text:line-break/> <text:s text:c="7"/>"recommended_rotation_deg": -12.4<text:line-break/> <text:s text:c="5"/>},<text:line-break/> <text:s text:c="5"/>"ocr_text": null,<text:line-break/> <text:s text:c="5"/>"reference_designator": {<text:line-break/> <text:s text:c="7"/>"text": "C45",<text:line-break/> <text:s text:c="7"/>"confidence": 0.81,<text:line-break/> <text:s text:c="7"/>"source": "silkscreen_ocr"<text:line-break/> <text:s text:c="5"/>},<text:line-break/> <text:s text:c="5"/>"context": {<text:line-break/> <text:s text:c="7"/>"nearby_components": ["cmp_0002", "cmp_0003"],<text:line-break/> <text:s text:c="7"/>"nearby_refs": ["U3", "R120"],<text:line-break/> <text:s text:c="7"/>"edge_distance_px": 214.0<text:line-break/> <text:s text:c="5"/>},<text:line-break/> <text:s text:c="5"/>"ambiguity": {<text:line-break/> <text:s text:c="7"/>"status": "low",<text:line-break/> <text:s text:c="7"/>"candidate_classes": [<text:line-break/> <text:s text:c="9"/>{"name": "capacitor", "score": 0.88},<text:line-break/> <text:s text:c="9"/>{"name": "resistor", "score": 0.09},<text:line-break/> <text:s text:c="9"/>{"name": "inductor", "score": 0.03}<text:line-break/></text:span></text:span><text:soft-page-break/><text:span text:style-name="Verbatim_20_Char"><text:span text:style-name="T13"> <text:s text:c="7"/>],<text:line-break/> <text:s text:c="7"/>"reasons": []<text:line-break/> <text:s text:c="5"/>},<text:line-break/> <text:s text:c="5"/>"quality_flags": {<text:line-break/> <text:s text:c="7"/>"blurred": false,<text:line-break/> <text:s text:c="7"/>"occluded": false,<text:line-break/> <text:s text:c="7"/>"low_light": false,<text:line-break/> <text:s text:c="7"/>"truncated": false<text:line-break/> <text:s text:c="5"/>},<text:line-break/> <text:s text:c="5"/>"review": {<text:line-break/> <text:s text:c="7"/>"required": false,<text:line-break/> <text:s text:c="7"/>"reason": null<text:line-break/> <text:s text:c="5"/>}<text:line-break/> <text:s text:c="3"/>}<text:line-break/> <text:s/>]<text:line-break/>}<text:line-break/></text:span></text:span></text:p>
      <text:p text:style-name="P22"><text:bookmark-start text:name="métricas"/><text:span text:style-name="T2">Métricas</text:span><text:bookmark-end text:name="métricas"/></text:p>
      <text:p text:style-name="P23"><text:span text:style-name="T3">Você precisa avaliar separadamente detecção, segmentação, classificação e calibração.</text:span></text:p>
      <text:p text:style-name="P22"><text:bookmark-start text:name="métricas_principais"/><text:span text:style-name="T2">Métricas principais</text:span><text:bookmark-end text:name="métricas_principais"/></text:p>
      <text:list text:style-name="WWNum43">
        <text:list-item>
          <text:p text:style-name="P58"><text:span text:style-name="T3">mAP@0.5 e mAP@[0.5:0.95] para detecção.</text:span></text:p>
        </text:list-item>
        <text:list-item>
          <text:p text:style-name="P58"><text:span text:style-name="T3">IoU e mIoU para máscara.</text:span></text:p>
        </text:list-item>
        <text:list-item>
          <text:p text:style-name="P59"><text:span text:style-name="T4">Precisão, recall e F1 por classe. Trabalhos em PCB usam IoU, precisão, recall e F1 como métricas centrais.</text:span><text:bookmark text:name="fnref1_17"/><text:a xlink:type="simple" xlink:href="#fn1" text:style-name="ListLabel_20_100" text:visited-style-name="ListLabel_20_100"><text:span text:style-name="T6">[1]</text:span></text:a></text:p>
        </text:list-item>
        <text:list-item>
          <text:p text:style-name="P58"><text:span text:style-name="T3">Matriz de confusão entre classes parecidas.</text:span></text:p>
        </text:list-item>
        <text:list-item>
          <text:p text:style-name="P58"><text:span text:style-name="T3">Top-1 / Top-2 accuracy para subtipo/package.</text:span></text:p>
        </text:list-item>
        <text:list-item>
          <text:p text:style-name="P58"><text:span text:style-name="T3">Erro angular médio da rotação.</text:span></text:p>
        </text:list-item>
        <text:list-item>
          <text:p text:style-name="P58"><text:span text:style-name="T3">OCR ROI recall: percentual em que a região gerada cobre a marcação útil.</text:span></text:p>
        </text:list-item>
        <text:list-item>
          <text:p text:style-name="P58"><text:soft-page-break/><text:span text:style-name="T3">ECE/Brier score para calibração de confiança.</text:span></text:p>
        </text:list-item>
        <text:list-item>
          <text:p text:style-name="P58"><text:span text:style-name="T3">Open-set reject rate para “desconhecido”.</text:span></text:p>
        </text:list-item>
      </text:list>
      <text:p text:style-name="P22"><text:bookmark-start text:name="métricas_por_fatia"/><text:span text:style-name="T2">Métricas por fatia</text:span><text:bookmark-end text:name="métricas_por_fatia"/></text:p>
      <text:p text:style-name="P23"><text:span text:style-name="T3">Relate por:</text:span></text:p>
      <text:list text:style-name="WWNum44">
        <text:list-item>
          <text:p text:style-name="P60"><text:span text:style-name="T3">tamanho do componente;</text:span></text:p>
        </text:list-item>
        <text:list-item>
          <text:p text:style-name="P60"><text:span text:style-name="T3">SMD vs PTH;</text:span></text:p>
        </text:list-item>
        <text:list-item>
          <text:p text:style-name="P60"><text:span text:style-name="T3">placa clara vs escura;</text:span></text:p>
        </text:list-item>
        <text:list-item>
          <text:p text:style-name="P60"><text:span text:style-name="T3">blur baixo/médio/alto;</text:span></text:p>
        </text:list-item>
        <text:list-item>
          <text:p text:style-name="P60"><text:span text:style-name="T3">oclusão;</text:span></text:p>
        </text:list-item>
        <text:list-item>
          <text:p text:style-name="P60"><text:span text:style-name="T3">serigrafia visível vs ausente.</text:span></text:p>
        </text:list-item>
      </text:list>
      <text:p text:style-name="P34"><text:span text:style-name="T4">Isso é essencial porque em PCB pequenos objetos e classes raras falham de formas diferentes.</text:span><text:bookmark text:name="fnref1_18"/><text:a xlink:type="simple" xlink:href="#fn1" text:style-name="ListLabel_20_101" text:visited-style-name="ListLabel_20_101"><text:span text:style-name="T6">[1]</text:span></text:a></text:p>
      <text:p text:style-name="P22"><text:bookmark-start text:name="ambiguidade_entre_classes"/><text:span text:style-name="T2">Ambiguidade entre classes</text:span><text:bookmark-end text:name="ambiguidade_entre_classes"/></text:p>
      <text:p text:style-name="P34"><text:span text:style-name="T4">Esse é um problema central, não um detalhe. A literatura destaca baixa variância entre classes diferentes e alta variância dentro da mesma classe, especialmente entre resistores, capacitores e ferrites; também há exemplos explícitos de ambiguidade transistor/diodo.</text:span><text:bookmark text:name="fnref1_19"/><text:a xlink:type="simple" xlink:href="#fn1" text:style-name="ListLabel_20_102" text:visited-style-name="ListLabel_20_102"><text:span text:style-name="T6">[1]</text:span></text:a></text:p>
      <text:p text:style-name="P22"><text:bookmark-start text:name="casos_típicos"/><text:span text:style-name="T2">Casos típicos</text:span><text:bookmark-end text:name="casos_típicos"/></text:p>
      <text:list text:style-name="WWNum45">
        <text:list-item>
          <text:p text:style-name="P61"><text:span text:style-name="T3">resistor chip vs capacitor cerâmico chip;</text:span></text:p>
        </text:list-item>
        <text:list-item>
          <text:p text:style-name="P61"><text:span text:style-name="T3">LED SMD vs diodo SMD;</text:span></text:p>
        </text:list-item>
        <text:list-item>
          <text:p text:style-name="P61"><text:span text:style-name="T3">transistor SOT-23 vs diodo dual/package pequeno;</text:span></text:p>
        </text:list-item>
        <text:list-item>
          <text:p text:style-name="P61"><text:span text:style-name="T3">regulador SOT-223/SOT-23-5 vs transistor de potência pequeno;</text:span></text:p>
        </text:list-item>
        <text:list-item>
          <text:p text:style-name="P61"><text:span text:style-name="T3">indutor blindado baixo vs capacitor/tantalum;</text:span></text:p>
        </text:list-item>
        <text:list-item>
          <text:p text:style-name="P61"><text:soft-page-break/><text:span text:style-name="T3">cristal metálico pequeno vs shield/can metálico.</text:span></text:p>
        </text:list-item>
      </text:list>
      <text:p text:style-name="P22"><text:bookmark-start text:name="como_lidar"/><text:span text:style-name="T2">Como lidar</text:span><text:bookmark-end text:name="como_lidar"/></text:p>
      <text:list text:style-name="WWNum46">
        <text:list-item>
          <text:p text:style-name="P62"><text:span text:style-name="T2">Classificação hierárquica</text:span><text:span text:style-name="T3">: primeiro “passive chip”, depois resistor/capacitor/indutor.</text:span></text:p>
        </text:list-item>
        <text:list-item>
          <text:p text:style-name="P62"><text:span text:style-name="T2">Top-k hypotheses</text:span><text:span text:style-name="T3"> em vez de uma única classe seca.</text:span></text:p>
        </text:list-item>
        <text:list-item>
          <text:p text:style-name="P62"><text:span text:style-name="T2">Reference designator OCR</text:span><text:span text:style-name="T3">:</text:span></text:p>
          <text:list>
            <text:list-item>
              <text:p text:style-name="P62"><text:span text:style-name="T3">R → resistor;</text:span></text:p>
            </text:list-item>
            <text:list-item>
              <text:p text:style-name="P62"><text:span text:style-name="T3">C → capacitor;</text:span></text:p>
            </text:list-item>
            <text:list-item>
              <text:p text:style-name="P62"><text:span text:style-name="T3">D/LED → diodo/LED;</text:span></text:p>
            </text:list-item>
            <text:list-item>
              <text:p text:style-name="P62"><text:span text:style-name="T3">Q → transistor;</text:span></text:p>
            </text:list-item>
            <text:list-item>
              <text:p text:style-name="P62"><text:span text:style-name="T3">U/IC → CI/regulador;</text:span></text:p>
            </text:list-item>
            <text:list-item>
              <text:p text:style-name="P62"><text:span text:style-name="T3">L → indutor;</text:span></text:p>
            </text:list-item>
            <text:list-item>
              <text:p text:style-name="P62"><text:span text:style-name="T3">X/Y → cristal;</text:span></text:p>
            </text:list-item>
            <text:list-item>
              <text:p text:style-name="P63"><text:span text:style-name="T4">J/CN/P → conector.</text:span><text:bookmark text:name="fnref1_20"/><text:a xlink:type="simple" xlink:href="#fn1" text:style-name="ListLabel_20_103" text:visited-style-name="ListLabel_20_103"><text:span text:style-name="T6">[1]</text:span></text:a></text:p>
            </text:list-item>
          </text:list>
        </text:list-item>
        <text:list-item>
          <text:p text:style-name="P62"><text:span text:style-name="T2">Contexto de vizinhança</text:span><text:span text:style-name="T3">:</text:span></text:p>
          <text:list>
            <text:list-item>
              <text:p text:style-name="P62"><text:span text:style-name="T3">LED costuma vir com resistor série;</text:span></text:p>
            </text:list-item>
            <text:list-item>
              <text:p text:style-name="P62"><text:span text:style-name="T3">cristal perto de MCU/SoC;</text:span></text:p>
            </text:list-item>
            <text:list-item>
              <text:p text:style-name="P62"><text:span text:style-name="T3">regulador perto de indutor/capacitores de potência;</text:span></text:p>
            </text:list-item>
            <text:list-item>
              <text:p text:style-name="P62"><text:span text:style-name="T3">conector perto da borda;</text:span></text:p>
            </text:list-item>
            <text:list-item>
              <text:p text:style-name="P62"><text:span text:style-name="T3">CI com agrupamento de passivos de desacoplamento.</text:span></text:p>
            </text:list-item>
          </text:list>
        </text:list-item>
        <text:list-item>
          <text:p text:style-name="P62"><text:span text:style-name="T2">Package</text:span><text:span text:style-name="T3">:</text:span></text:p>
          <text:list>
            <text:list-item>
              <text:p text:style-name="P62"><text:span text:style-name="T3">LED e diodo podem compartilhar formato, mas janela óptica, coloração/lente e marca de polaridade ajudam;</text:span></text:p>
            </text:list-item>
            <text:list-item>
              <text:p text:style-name="P62"><text:soft-page-break/><text:span text:style-name="T3">resistor/capacitor chip diferem em textura, marcação e comportamento dos terminais.</text:span></text:p>
            </text:list-item>
          </text:list>
        </text:list-item>
        <text:list-item>
          <text:p text:style-name="P62"><text:span text:style-name="T2">Rejeição para classe desconhecida</text:span><text:span text:style-name="T3">:</text:span></text:p>
          <text:list>
            <text:list-item>
              <text:p text:style-name="P62"><text:span text:style-name="T3">melhor devolver “ambíguo” ou “unknown_passive” do que inventar.</text:span></text:p>
            </text:list-item>
          </text:list>
        </text:list-item>
      </text:list>
      <text:p text:style-name="P22"><text:bookmark-start text:name="revisão_humana"/><text:span text:style-name="T2">Revisão humana</text:span><text:bookmark-end text:name="revisão_humana"/></text:p>
      <text:p text:style-name="P23"><text:span text:style-name="T3">Eu colocaria revisão humana nativa no desenho do sistema.</text:span></text:p>
      <text:p text:style-name="P22"><text:bookmark-start text:name="disparadores"/><text:span text:style-name="T2">Disparadores</text:span><text:bookmark-end text:name="disparadores"/></text:p>
      <text:p text:style-name="P23"><text:span text:style-name="T3">Enviar para revisão quando houver:</text:span></text:p>
      <text:list text:style-name="WWNum47">
        <text:list-item>
          <text:p text:style-name="P64"><text:span text:style-name="Verbatim_20_Char"><text:span text:style-name="T12">overall_confidence &lt; 0.75</text:span></text:span><text:span text:style-name="T4">;</text:span></text:p>
        </text:list-item>
        <text:list-item>
          <text:p text:style-name="P65"><text:span text:style-name="T3">diferença pequena entre top-1 e top-2, ex. &lt; 0.12;</text:span></text:p>
        </text:list-item>
        <text:list-item>
          <text:p text:style-name="P65"><text:span text:style-name="T3">conflito entre visão e referência OCR;</text:span></text:p>
        </text:list-item>
        <text:list-item>
          <text:p text:style-name="P65"><text:span text:style-name="T3">package incompatível com classe;</text:span></text:p>
        </text:list-item>
        <text:list-item>
          <text:p text:style-name="P65"><text:span text:style-name="T3">oclusão forte, blur ou corte;</text:span></text:p>
        </text:list-item>
        <text:list-item>
          <text:p text:style-name="P65"><text:span text:style-name="T3">componente raro ou fora do domínio.</text:span></text:p>
        </text:list-item>
      </text:list>
      <text:p text:style-name="P22"><text:bookmark-start text:name="interface_ideal"/><text:span text:style-name="T2">Interface ideal</text:span><text:bookmark-end text:name="interface_ideal"/></text:p>
      <text:p text:style-name="P23"><text:span text:style-name="T3">O revisor vê:</text:span></text:p>
      <text:list text:style-name="WWNum48">
        <text:list-item>
          <text:p text:style-name="P66"><text:span text:style-name="T3">crop do componente;</text:span></text:p>
        </text:list-item>
        <text:list-item>
          <text:p text:style-name="P66"><text:span text:style-name="T3">máscara sobreposta;</text:span></text:p>
        </text:list-item>
        <text:list-item>
          <text:p text:style-name="P66"><text:span text:style-name="T3">classe top-3;</text:span></text:p>
        </text:list-item>
        <text:list-item>
          <text:p text:style-name="P66"><text:span text:style-name="T3">package top-3;</text:span></text:p>
        </text:list-item>
        <text:list-item>
          <text:p text:style-name="P66"><text:span text:style-name="T3">OCR da serigrafia;</text:span></text:p>
        </text:list-item>
        <text:list-item>
          <text:p text:style-name="P66"><text:span text:style-name="T3">vizinhos e referências próximas;</text:span></text:p>
        </text:list-item>
        <text:list-item>
          <text:p text:style-name="P66"><text:soft-page-break/><text:span text:style-name="T3">motivo da dúvida.</text:span></text:p>
        </text:list-item>
      </text:list>
      <text:p text:style-name="P22"><text:bookmark-start text:name="aprendizado_contínuo"/><text:span text:style-name="T2">Aprendizado contínuo</text:span><text:bookmark-end text:name="aprendizado_contínuo"/></text:p>
      <text:p text:style-name="P23"><text:span text:style-name="T3">Correções humanas voltam para:</text:span></text:p>
      <text:list text:style-name="WWNum49">
        <text:list-item>
          <text:p text:style-name="P67"><text:span text:style-name="T3">re-treino periódico;</text:span></text:p>
        </text:list-item>
        <text:list-item>
          <text:p text:style-name="P67"><text:span text:style-name="T3">hard example mining;</text:span></text:p>
        </text:list-item>
        <text:list-item>
          <text:p text:style-name="P67"><text:span text:style-name="T3">expansão das subclasses;</text:span></text:p>
        </text:list-item>
        <text:list-item>
          <text:p text:style-name="P67"><text:span text:style-name="T3">calibração de confiança.</text:span></text:p>
        </text:list-item>
      </text:list>
      <text:p text:style-name="P22"><text:bookmark-start text:name="bibliotecas_recomendadas"/><text:span text:style-name="T2">Bibliotecas recomendadas</text:span><text:bookmark-end text:name="bibliotecas_recomendadas"/></text:p>
      <text:list text:style-name="WWNum50">
        <text:list-item>
          <text:p text:style-name="P68"><text:span text:style-name="T10">OpenCV</text:span><text:span text:style-name="T4">: retificação, morfologia, contornos, orientação, ROIs.</text:span><text:bookmark text:name="fnref3_3"/><text:a xlink:type="simple" xlink:href="#fn3" text:style-name="ListLabel_20_104" text:visited-style-name="ListLabel_20_104"><text:span text:style-name="T5">[3]</text:span></text:a><text:bookmark text:name="fnref2_7"/><text:a xlink:type="simple" xlink:href="#fn2" text:style-name="ListLabel_20_105" text:visited-style-name="ListLabel_20_105"><text:span text:style-name="T5">[2]</text:span></text:a></text:p>
        </text:list-item>
        <text:list-item>
          <text:p text:style-name="P69"><text:span text:style-name="T2">PyTorch</text:span><text:span text:style-name="T3">: treino e inferência principal.</text:span></text:p>
        </text:list-item>
        <text:list-item>
          <text:p text:style-name="P69"><text:span text:style-name="T2">Ultralytics YOLO</text:span><text:span text:style-name="T3"> ou MMYOLO: baseline forte e rápida.</text:span></text:p>
        </text:list-item>
        <text:list-item>
          <text:p text:style-name="P69"><text:span text:style-name="T2">MMDetection / MMDetection3D / MMRotate</text:span><text:span text:style-name="T3">: detecção, oriented boxes e experimentação.</text:span></text:p>
        </text:list-item>
        <text:list-item>
          <text:p text:style-name="P69"><text:span text:style-name="T2">Detectron2</text:span><text:span text:style-name="T3">: instance segmentation robusta.</text:span></text:p>
        </text:list-item>
        <text:list-item>
          <text:p text:style-name="P69"><text:span text:style-name="T2">Transformers / detrex / RT-DETR stack</text:span><text:span text:style-name="T3">: variantes DETR.</text:span></text:p>
        </text:list-item>
        <text:list-item>
          <text:p text:style-name="P68"><text:span text:style-name="T10">segment-anything</text:span><text:span text:style-name="T4">: refinamento de máscara assistido por box.</text:span><text:bookmark text:name="fnref1_21"/><text:a xlink:type="simple" xlink:href="#fn1" text:style-name="ListLabel_20_106" text:visited-style-name="ListLabel_20_106"><text:span text:style-name="T6">[1]</text:span></text:a></text:p>
        </text:list-item>
        <text:list-item>
          <text:p text:style-name="P68"><text:span text:style-name="T10">Albumentations</text:span><text:span text:style-name="T4">: augmentations; é citada explicitamente em experimentos de PCB RGB.</text:span><text:bookmark text:name="fnref2_8"/><text:a xlink:type="simple" xlink:href="#fn2" text:style-name="ListLabel_20_107" text:visited-style-name="ListLabel_20_107"><text:span text:style-name="T6">[2]</text:span></text:a></text:p>
        </text:list-item>
        <text:list-item>
          <text:p text:style-name="P69"><text:span text:style-name="T2">PaddleOCR ou Tesseract + EasyOCR</text:span><text:span text:style-name="T3">: OCR em serigrafia e marcações.</text:span></text:p>
        </text:list-item>
        <text:list-item>
          <text:p text:style-name="P69"><text:span text:style-name="T2">Shapely</text:span><text:span text:style-name="T3">: polígonos, IoU de máscaras.</text:span></text:p>
        </text:list-item>
        <text:list-item>
          <text:p text:style-name="P69"><text:span text:style-name="T2">scikit-image</text:span><text:span text:style-name="T3">: filtros, regionprops, skeleton.</text:span></text:p>
        </text:list-item>
        <text:list-item>
          <text:p text:style-name="P69"><text:span text:style-name="T2">SciPy</text:span><text:span text:style-name="T3">: matching, calibração, clustering.</text:span></text:p>
        </text:list-item>
        <text:list-item>
          <text:p text:style-name="P69"><text:span text:style-name="T2">NetworkX</text:span><text:span text:style-name="T3">: grafo de contexto de vizinhança.</text:span></text:p>
        </text:list-item>
        <text:list-item>
          <text:p text:style-name="P68"><text:soft-page-break/><text:span text:style-name="T10">CVAT / Label Studio</text:span><text:span text:style-name="T4">: anotação; CVAT aparece em trabalho de PCB para labeling.</text:span><text:bookmark text:name="fnref1_22"/><text:a xlink:type="simple" xlink:href="#fn1" text:style-name="ListLabel_20_108" text:visited-style-name="ListLabel_20_108"><text:span text:style-name="T6">[1]</text:span></text:a></text:p>
        </text:list-item>
      </text:list>
      <text:p text:style-name="P22"><text:bookmark-start text:name="riscos_e_limitações"/><text:span text:style-name="T2">Riscos e limitações</text:span><text:bookmark-end text:name="riscos_e_limitações"/></text:p>
      <text:p text:style-name="P23"><text:span text:style-name="T3">Os limites reais precisam ficar explícitos:</text:span></text:p>
      <text:list text:style-name="WWNum51">
        <text:list-item>
          <text:p text:style-name="P70"><text:span text:style-name="T2">Package não é garantido</text:span><text:span text:style-name="T3"> sem escala confiável ou múltiplas vistas.</text:span></text:p>
        </text:list-item>
        <text:list-item>
          <text:p text:style-name="P71"><text:span text:style-name="T10">RGB sozinho não resolve tudo</text:span><text:span text:style-name="T4">; materiais diferentes podem parecer iguais, e superfícies pretas podem confundir com fundo. Em dataset multimodal, até IC e esteira preta tiveram assinaturas próximas em certos cenários.</text:span><text:bookmark text:name="fnref2_9"/><text:a xlink:type="simple" xlink:href="#fn2" text:style-name="ListLabel_20_109" text:visited-style-name="ListLabel_20_109"><text:span text:style-name="T6">[2]</text:span></text:a></text:p>
        </text:list-item>
        <text:list-item>
          <text:p text:style-name="P71"><text:span text:style-name="T10">DETR puro pode sofrer com objetos muito pequenos</text:span><text:span text:style-name="T4"> em PCB.</text:span><text:bookmark text:name="fnref1_23"/><text:a xlink:type="simple" xlink:href="#fn1" text:style-name="ListLabel_20_110" text:visited-style-name="ListLabel_20_110"><text:span text:style-name="T6">[1]</text:span></text:a></text:p>
        </text:list-item>
        <text:list-item>
          <text:p text:style-name="P71"><text:span text:style-name="T10">Anotar máscara instance-level custa caro</text:span><text:span text:style-name="T4"> e escala mal.</text:span><text:bookmark text:name="fnref1_24"/><text:a xlink:type="simple" xlink:href="#fn1" text:style-name="ListLabel_20_111" text:visited-style-name="ListLabel_20_111"><text:span text:style-name="T6">[1]</text:span></text:a></text:p>
        </text:list-item>
        <text:list-item>
          <text:p text:style-name="P70"><text:span text:style-name="T2">OCR de serigrafia falha</text:span><text:span text:style-name="T3"> com blur, verniz, sombra e impressão parcial.</text:span></text:p>
        </text:list-item>
        <text:list-item>
          <text:p text:style-name="P70"><text:span text:style-name="T2">Oclusão e perspectiva severa</text:span><text:span text:style-name="T3"> podem inviabilizar contagem exata de terminais.</text:span></text:p>
        </text:list-item>
        <text:list-item>
          <text:p text:style-name="P70"><text:span text:style-name="T2">Domínio muda muito</text:span><text:span text:style-name="T3"> entre placa industrial, automotiva, fonte, notebook, placa preta, placa envernizada, solda oxidada.</text:span></text:p>
        </text:list-item>
        <text:list-item>
          <text:p text:style-name="P70"><text:span text:style-name="T2">Classe semântica não implica valor elétrico</text:span><text:span text:style-name="T3">: ver “regulador” pela foto não garante part number nem tensão/corrente.</text:span></text:p>
        </text:list-item>
        <text:list-item>
          <text:p text:style-name="P70"><text:span text:style-name="T2">Componentes visualmente idênticos podem exercer funções distintas</text:span><text:span text:style-name="T3">, então manutenção/clonagem exigem validação adicional.</text:span></text:p>
        </text:list-item>
      </text:list>
      <text:p text:style-name="P22"><text:bookmark-start text:name="perguntas_de_projeto"/><text:span text:style-name="T2">Perguntas de projeto</text:span><text:bookmark-end text:name="perguntas_de_projeto"/></text:p>
      <text:p text:style-name="P23"><text:span text:style-name="T3">Antes de fechar a especificação, eu exigiria estas respostas:</text:span></text:p>
      <text:list text:style-name="WWNum52">
        <text:list-item>
          <text:p text:style-name="P72"><text:span text:style-name="T3">Haverá foto apenas do lado superior ou dos dois lados?</text:span></text:p>
        </text:list-item>
        <text:list-item>
          <text:p text:style-name="P72"><text:span text:style-name="T3">Haverá macro de alta resolução ou fotos de celular?</text:span></text:p>
        </text:list-item>
        <text:list-item>
          <text:p text:style-name="P72"><text:span text:style-name="T3">Haverá acesso a raio-X, continuidade elétrica ou apenas imagem RGB?</text:span></text:p>
        </text:list-item>
        <text:list-item>
          <text:p text:style-name="P72"><text:span text:style-name="T3">A placa terá serigrafia visível?</text:span></text:p>
        </text:list-item>
        <text:list-item>
          <text:p text:style-name="P72"><text:soft-page-break/><text:span text:style-name="T3">O objetivo é manutenção, clonagem, documentação ou simulação?</text:span></text:p>
        </text:list-item>
      </text:list>
      <text:p text:style-name="P23"><text:span text:style-name="T3">E eu ainda acrescentaria duas perguntas operacionais:</text:span></text:p>
      <text:list text:style-name="WWNum53">
        <text:list-item>
          <text:p text:style-name="P73"><text:span text:style-name="T3">Haverá escala conhecida na imagem, como régua, fiduciais ou dimensão física da placa?</text:span></text:p>
        </text:list-item>
        <text:list-item>
          <text:p text:style-name="P73"><text:span text:style-name="T3">O sistema precisa operar em lote offline ou em quase tempo real?</text:span></text:p>
        </text:list-item>
      </text:list>
      <text:p text:style-name="P23"><text:span text:style-name="T3">Se quiser, eu posso transformar isso no próximo passo em uma </text:span><text:span text:style-name="T2">especificação técnica implementável em Python</text:span><text:span text:style-name="T3">, com classes, interfaces, pseudocódigo e estrutura de pastas do módul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3" svg:font-family="'source sans 3'" style:font-family-generic="roman" style:font-pitch="variable"/>
    <style:font-face style:name="source sans 31" svg:font-family="'source sans 3'" style:font-family-generic="system" style:font-pitch="variable"/>
    <style:font-face style:name="source serif 4" svg:font-family="'source serif 4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4" style:display-name="ListLabel 4" style:family="text"/>
    <style:style style:name="ListLabel_20_5" style:display-name="ListLabel 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1" style:display-name="ListLabel 71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72" style:display-name="ListLabel 72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73" style:display-name="ListLabel 73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74" style:display-name="ListLabel 74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/>
    <style:style style:name="ListLabel_20_75" style:display-name="ListLabel 75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76" style:display-name="ListLabel 76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79" style:display-name="ListLabel 79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80" style:display-name="ListLabel 80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81" style:display-name="ListLabel 81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82" style:display-name="ListLabel 82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83" style:display-name="ListLabel 83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84" style:display-name="ListLabel 84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85" style:display-name="ListLabel 85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86" style:display-name="ListLabel 86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87" style:display-name="ListLabel 87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88" style:display-name="ListLabel 88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89" style:display-name="ListLabel 89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90" style:display-name="ListLabel 90" style:family="text">
      <style:text-properties style:use-window-font-color="true" loext:opacity="0%" style:text-position="super 58%" style:font-name="source sans 3" fo:font-family="'source sans 3'" style:font-family-generic="roman" style:font-pitch="variable" fo:font-size="8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8.5pt" style:font-name-complex="source sans 31" style:font-family-complex="'source sans 3'" style:font-family-generic-complex="system" style:font-pitch-complex="variable"/>
    </style:style>
    <style:style style:name="ListLabel_20_24" style:display-name="ListLabel 24" style:family="text"/>
    <style:style style:name="ListLabel_20_91" style:display-name="ListLabel 91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92" style:display-name="ListLabel 92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93" style:display-name="ListLabel 93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95" style:display-name="ListLabel 95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96" style:display-name="ListLabel 96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97" style:display-name="ListLabel 97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99" style:display-name="ListLabel 99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100" style:display-name="ListLabel 100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50" style:display-name="ListLabel 50" style:family="text"/>
    <style:style style:name="ListLabel_20_101" style:display-name="ListLabel 101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102" style:display-name="ListLabel 102" style:family="text">
      <style:text-properties style:use-window-font-color="true" loext:opacity="0%" style:text-position="super 58%" style:font-name="source sans 3" fo:font-family="'source sans 3'" style:font-family-generic="roman" style:font-pitch="variable" style:text-underline-style="solid" style:text-underline-width="auto" style:text-underline-color="font-color" style:font-name-asian="source sans 31" style:font-family-asian="'source sans 3'" style:font-family-generic-asian="system" style:font-pitch-asian="variable" style:font-name-complex="source sans 31" style:font-family-complex="'source sans 3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104" style:display-name="ListLabel 104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05" style:display-name="ListLabel 105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06" style:display-name="ListLabel 106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07" style:display-name="ListLabel 107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08" style:display-name="ListLabel 108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58" style:display-name="ListLabel 58" style:family="text"/>
    <style:style style:name="ListLabel_20_109" style:display-name="ListLabel 109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10" style:display-name="ListLabel 110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111" style:display-name="ListLabel 111" style:family="text">
      <style:text-properties style:use-window-font-color="true" loext:opacity="0%" style:text-position="super 58%" style:font-name="source sans 3" fo:font-family="'source sans 3'" style:font-family-generic="roman" style:font-pitch="variable" fo:font-size="10.5pt" style:text-underline-style="solid" style:text-underline-width="auto" style:text-underline-color="font-color" style:font-name-asian="source sans 31" style:font-family-asian="'source sans 3'" style:font-family-generic-asian="system" style:font-pitch-asian="variable" style:font-size-asian="10.5pt" style:font-name-complex="source sans 31" style:font-family-complex="'source sans 3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5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8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1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34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36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44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46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3T09:18:14.876842200</meta:creation-date>
    <dc:date>2026-06-13T09:19:27.114806300</dc:date>
    <meta:editing-duration>PT1M12S</meta:editing-duration>
    <meta:editing-cycles>1</meta:editing-cycles>
    <meta:document-statistic meta:table-count="1" meta:image-count="0" meta:object-count="0" meta:page-count="19" meta:paragraph-count="321" meta:word-count="2380" meta:character-count="16376" meta:non-whitespace-character-count="14170"/>
    <meta:generator>LibreOffice/26.2.3.2$Windows_X86_64 LibreOffice_project/70e089b17412e4cb7773e41413306b17a2328c34</meta:generator>
  </office:meta>
</office:document-meta>
</file>